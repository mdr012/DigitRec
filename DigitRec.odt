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D0000030A104ACE49.png" manifest:media-type="image/png"/>
  <manifest:file-entry manifest:full-path="Pictures/10000001000002FD0000030A64C1EE5D.png" manifest:media-type="image/png"/>
  <manifest:file-entry manifest:full-path="Pictures/10000001000002BD00000306BBFBFCF8.png" manifest:media-type="image/png"/>
  <manifest:file-entry manifest:full-path="Pictures/10000001000002FD0000030A60575AD2.png" manifest:media-type="image/png"/>
  <manifest:file-entry manifest:full-path="Pictures/10000001000002FD0000030ACDB61AE8.png" manifest:media-type="image/png"/>
  <manifest:file-entry manifest:full-path="Pictures/10000001000002CD000002F386440AC8.png" manifest:media-type="image/png"/>
  <manifest:file-entry manifest:full-path="Pictures/10000001000002CC0000030D2E67A2C2.png" manifest:media-type="image/png"/>
  <manifest:file-entry manifest:full-path="Pictures/10000001000002FD0000030A51CC3142.png" manifest:media-type="image/png"/>
  <manifest:file-entry manifest:full-path="Pictures/10000001000002CC0000030D3A207EF9.png" manifest:media-type="image/png"/>
  <manifest:file-entry manifest:full-path="Pictures/10000001000002CD00000298210A57DA.png" manifest:media-type="image/png"/>
  <manifest:file-entry manifest:full-path="Pictures/10000001000002CD000002F34C33C315.png" manifest:media-type="image/png"/>
  <manifest:file-entry manifest:full-path="Pictures/100000000000016A0000015B02543462.jpg" manifest:media-type="image/jpeg"/>
  <manifest:file-entry manifest:full-path="Pictures/10000000000000E1000000E193AC4DF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family-generic="roma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ing_20_1">
      <style:paragraph-properties fo:line-height="0.649cm"/>
    </style:style>
    <style:style style:name="P2" style:family="paragraph" style:parent-style-name="Heading_20_1">
      <style:paragraph-properties fo:line-height="0.649cm"/>
      <style:text-properties officeooo:paragraph-rsid="000b259a"/>
    </style:style>
    <style:style style:name="P3" style:family="paragraph" style:parent-style-name="Heading_20_1">
      <style:paragraph-properties fo:margin-top="0.453cm" fo:margin-bottom="0cm" style:contextual-spacing="false"/>
      <style:text-properties officeooo:paragraph-rsid="0007b641"/>
    </style:style>
    <style:style style:name="P4" style:family="paragraph" style:parent-style-name="List_20_Paragraph">
      <style:paragraph-properties fo:margin-left="0.002cm" fo:margin-right="0.242cm" fo:margin-top="0.002cm" fo:margin-bottom="0cm" style:contextual-spacing="false" fo:text-align="justify" style:justify-single-word="false" fo:text-indent="0cm" style:auto-text-indent="false">
        <style:tab-stops>
          <style:tab-stop style:position="0.399cm"/>
        </style:tab-stops>
      </style:paragraph-properties>
      <style:text-properties fo:font-size="14pt" fo:font-weight="normal" style:font-size-asian="14pt" style:font-weight-asian="normal" style:font-size-complex="14pt" style:font-weight-complex="normal"/>
    </style:style>
    <style:style style:name="P5" style:family="paragraph" style:parent-style-name="Text_20_body">
      <style:paragraph-properties fo:margin-left="0.002cm" fo:margin-right="0.243cm" fo:text-align="justify" style:justify-single-word="false" fo:text-indent="0cm" style:auto-text-indent="false">
        <style:tab-stops>
          <style:tab-stop style:position="0.407cm"/>
        </style:tab-stops>
      </style:paragraph-properties>
      <style:text-properties fo:font-size="14pt" fo:font-weight="normal" style:font-size-asian="14pt" style:font-weight-asian="normal" style:font-size-complex="14pt" style:font-weight-complex="normal"/>
    </style:style>
    <style:style style:name="P6" style:family="paragraph" style:parent-style-name="Heading_20_1">
      <style:paragraph-properties fo:line-height="0.649cm"/>
      <style:text-properties fo:font-size="14pt" fo:font-weight="bold" officeooo:rsid="000b259a" officeooo:paragraph-rsid="000b259a" style:font-size-asian="14pt" style:font-weight-asian="bold" style:font-size-complex="14pt" style:font-weight-complex="bold"/>
    </style:style>
    <style:style style:name="P7" style:family="paragraph" style:parent-style-name="Heading_20_1">
      <style:paragraph-properties fo:line-height="0.649cm"/>
      <style:text-properties fo:font-size="16pt" fo:font-weight="bold" officeooo:rsid="000b259a" officeooo:paragraph-rsid="000b259a" style:font-size-asian="14pt" style:font-weight-asian="bold" style:font-size-complex="16pt" style:font-weight-complex="bold"/>
    </style:style>
    <style:style style:name="P8" style:family="paragraph" style:parent-style-name="Heading_20_2">
      <style:paragraph-properties fo:margin-left="0.236cm" fo:margin-right="1.778cm" fo:line-height="0.485cm" fo:text-indent="0cm" style:auto-text-indent="false"/>
    </style:style>
    <style:style style:name="P9" style:family="paragraph" style:parent-style-name="Text_20_body">
      <style:paragraph-properties fo:margin-left="3.662cm" fo:margin-right="3.727cm" fo:margin-top="0.014cm" fo:margin-bottom="0cm" style:contextual-spacing="false" fo:text-align="center" style:justify-single-word="false"/>
    </style:style>
    <style:style style:name="P10" style:family="paragraph" style:parent-style-name="Text_20_body">
      <style:paragraph-properties fo:margin-top="0cm" fo:margin-bottom="0.499cm" style:contextual-spacing="false"/>
    </style:style>
    <style:style style:name="P11" style:family="paragraph" style:parent-style-name="Heading_20_1">
      <style:paragraph-properties fo:margin-top="0.099cm" fo:margin-bottom="0cm" style:contextual-spacing="false"/>
      <style:text-properties fo:letter-spacing="-0.004cm"/>
    </style:style>
    <style:style style:name="P12" style:family="paragraph" style:parent-style-name="Heading_20_1">
      <style:paragraph-properties fo:margin-top="0.099cm" fo:margin-bottom="0cm" style:contextual-spacing="false"/>
      <style:text-properties fo:letter-spacing="-0.004cm" fo:font-weight="normal" style:font-weight-asian="normal" style:font-weight-complex="normal"/>
    </style:style>
    <style:style style:name="P13" style:family="paragraph" style:parent-style-name="Heading_20_1">
      <style:paragraph-properties fo:line-height="0.649cm"/>
      <style:text-properties style:font-name="Calibri" fo:font-size="14pt" fo:letter-spacing="-0.004cm" fo:font-weight="normal" officeooo:rsid="000b259a" officeooo:paragraph-rsid="000e6f5d" style:font-size-asian="14pt" style:font-weight-asian="normal" style:font-size-complex="14pt" style:font-weight-complex="normal"/>
    </style:style>
    <style:style style:name="P14" style:family="paragraph" style:parent-style-name="Heading_20_1">
      <style:paragraph-properties fo:line-height="0.649cm"/>
      <style:text-properties style:font-name="Calibri" fo:font-size="14pt" fo:letter-spacing="-0.004cm" style:text-underline-style="none" fo:font-weight="normal" officeooo:rsid="000b259a" officeooo:paragraph-rsid="000f4d92" style:font-size-asian="12.25pt" style:font-weight-asian="normal" style:font-size-complex="14pt" style:font-weight-complex="normal"/>
    </style:style>
    <style:style style:name="P15" style:family="paragraph" style:parent-style-name="Heading_20_1">
      <style:paragraph-properties fo:line-height="0.649cm"/>
      <style:text-properties style:font-name="Calibri" fo:font-size="16pt" fo:letter-spacing="-0.004cm" fo:font-weight="bold" officeooo:rsid="000e6f5d" officeooo:paragraph-rsid="000e6f5d" style:font-size-asian="14pt" style:font-weight-asian="bold" style:font-size-complex="16pt" style:font-weight-complex="bold"/>
    </style:style>
    <style:style style:name="P16" style:family="paragraph" style:parent-style-name="Heading_20_1">
      <style:paragraph-properties fo:line-height="0.649cm"/>
      <style:text-properties style:font-name="Calibri" fo:font-size="16pt" fo:letter-spacing="-0.004cm" fo:font-weight="bold" officeooo:rsid="000e6f5d" officeooo:paragraph-rsid="000e9802" style:font-size-asian="14pt" style:font-weight-asian="bold" style:font-size-complex="16pt" style:font-weight-complex="bold"/>
    </style:style>
    <style:style style:name="P17" style:family="paragraph" style:parent-style-name="Heading_20_1">
      <style:paragraph-properties fo:line-height="0.649cm"/>
      <style:text-properties style:font-name="Calibri" fo:font-size="16pt" fo:letter-spacing="-0.004cm" fo:font-weight="bold" officeooo:rsid="000e6f5d" officeooo:paragraph-rsid="000f4d92" style:font-size-asian="14pt" style:font-weight-asian="bold" style:font-size-complex="16pt" style:font-weight-complex="bold"/>
    </style:style>
    <style:style style:name="P18" style:family="paragraph" style:parent-style-name="Heading_20_1">
      <style:paragraph-properties fo:line-height="0.649cm"/>
      <style:text-properties officeooo:rsid="000bb415" officeooo:paragraph-rsid="000bb415"/>
    </style:style>
    <style:style style:name="P19" style:family="paragraph" style:parent-style-name="Text_20_body">
      <style:paragraph-properties fo:margin-top="0.24cm" fo:margin-bottom="0cm" style:contextual-spacing="false"/>
    </style:style>
    <style:style style:name="P20" style:family="paragraph" style:parent-style-name="List_20_Paragraph">
      <style:paragraph-properties fo:margin-left="0.002cm" fo:margin-right="0.243cm" fo:text-align="justify" style:justify-single-word="false" fo:text-indent="0cm" style:auto-text-indent="false">
        <style:tab-stops>
          <style:tab-stop style:position="0.407cm"/>
        </style:tab-stops>
      </style:paragraph-properties>
      <style:text-properties style:font-name="Calibri1" fo:font-size="14pt" fo:font-weight="normal" style:font-size-asian="14pt" style:font-weight-asian="normal" style:font-size-complex="14pt" style:font-weight-complex="normal"/>
    </style:style>
    <style:style style:name="P21" style:family="paragraph" style:parent-style-name="Heading_20_1">
      <style:paragraph-properties fo:margin-top="0.099cm" fo:margin-bottom="0cm" style:contextual-spacing="false"/>
      <style:text-properties style:font-name="Calibri1" fo:letter-spacing="-0.004cm"/>
    </style:style>
    <style:style style:name="P22" style:family="paragraph" style:parent-style-name="Heading_20_1">
      <style:paragraph-properties fo:margin-top="0.099cm" fo:margin-bottom="0cm" style:contextual-spacing="false"/>
      <style:text-properties style:font-name="Calibri1" fo:letter-spacing="-0.004cm" officeooo:rsid="00111c38" officeooo:paragraph-rsid="00111c38"/>
    </style:style>
    <style:style style:name="P23" style:family="paragraph" style:parent-style-name="Frame_20_contents">
      <style:paragraph-properties fo:margin-left="0.035cm" fo:margin-top="0.012cm" fo:margin-bottom="0cm" style:contextual-spacing="false"/>
    </style:style>
    <style:style style:name="P24" style:family="paragraph" style:parent-style-name="Heading_20_1" style:master-page-name="Standard">
      <style:paragraph-properties fo:margin-left="0.026cm" fo:margin-right="0.104cm" fo:margin-top="0.109cm" fo:margin-bottom="0cm" style:contextual-spacing="false" fo:line-height="0.647cm" fo:text-align="center" style:justify-single-word="false" style:page-number="auto"/>
    </style:style>
    <style:style style:name="P25" style:family="paragraph" style:parent-style-name="Heading_20_1" style:master-page-name="Converted1">
      <style:paragraph-properties fo:margin-top="0.453cm" fo:margin-bottom="0cm" style:contextual-spacing="false" style:page-number="auto"/>
      <style:text-properties fo:letter-spacing="-0.004cm" officeooo:rsid="0009622f" officeooo:paragraph-rsid="0009622f"/>
    </style:style>
    <style:style style:name="P26" style:family="paragraph" style:parent-style-name="Heading_20_1" style:master-page-name="Converted4">
      <style:paragraph-properties fo:line-height="0.649cm" style:page-number="auto"/>
      <style:text-properties fo:letter-spacing="-0.004cm" officeooo:paragraph-rsid="000e6f5d"/>
    </style:style>
    <style:style style:name="P27" style:family="paragraph" style:parent-style-name="Heading_20_1" style:master-page-name="Converted3">
      <style:paragraph-properties fo:margin-top="0.102cm" fo:margin-bottom="0cm" style:contextual-spacing="false" style:page-number="auto"/>
    </style:style>
    <style:style style:name="P28" style:family="paragraph" style:parent-style-name="Heading_20_1" style:list-style-name="L5">
      <style:paragraph-properties fo:line-height="0.649cm"/>
      <style:text-properties style:font-name="Calibri" fo:font-size="14pt" fo:letter-spacing="-0.004cm" fo:font-weight="bold" style:font-size-asian="14pt" style:font-weight-asian="bold" style:font-size-complex="14pt" style:font-weight-complex="bold"/>
    </style:style>
    <style:style style:name="P29" style:family="paragraph" style:parent-style-name="Heading_20_1">
      <style:paragraph-properties fo:line-height="0.649cm"/>
      <style:text-properties style:font-name="Calibri" fo:font-size="14pt" fo:letter-spacing="-0.004cm" style:text-underline-style="solid" style:text-underline-width="auto" style:text-underline-color="font-color" fo:font-weight="bold" officeooo:rsid="000b259a" officeooo:paragraph-rsid="000b259a" style:font-size-asian="14pt" style:font-weight-asian="bold" style:font-size-complex="14pt" style:font-weight-complex="bold"/>
    </style:style>
    <style:style style:name="P30" style:family="paragraph" style:parent-style-name="Heading_20_1">
      <style:paragraph-properties fo:line-height="0.649cm"/>
      <style:text-properties style:font-name="Calibri" fo:font-size="14pt" fo:letter-spacing="-0.004cm" style:text-underline-style="solid" style:text-underline-width="auto" style:text-underline-color="font-color" fo:font-weight="bold" officeooo:rsid="000b259a" officeooo:paragraph-rsid="000e6f5d" style:font-size-asian="14pt" style:font-weight-asian="bold" style:font-size-complex="14pt" style:font-weight-complex="bold"/>
    </style:style>
    <style:style style:name="P31" style:family="paragraph" style:parent-style-name="Heading_20_1">
      <style:paragraph-properties fo:line-height="0.649cm"/>
      <style:text-properties style:font-name="Calibri" fo:font-size="14pt" fo:letter-spacing="-0.004cm" style:text-underline-style="solid" style:text-underline-width="auto" style:text-underline-color="font-color" fo:font-weight="bold" officeooo:rsid="000b259a" officeooo:paragraph-rsid="000f4d92" style:font-size-asian="14pt" style:font-weight-asian="bold" style:font-size-complex="14pt" style:font-weight-complex="bold"/>
    </style:style>
    <style:style style:name="P32" style:family="paragraph" style:parent-style-name="Heading_20_1">
      <style:paragraph-properties fo:line-height="0.649cm"/>
      <style:text-properties style:font-name="Calibri" fo:font-size="12pt" fo:letter-spacing="-0.004cm" fo:font-weight="normal" style:font-size-asian="12pt" style:font-weight-asian="normal" style:font-size-complex="12pt" style:font-weight-complex="normal"/>
    </style:style>
    <style:style style:name="P33" style:family="paragraph" style:parent-style-name="Heading_20_1">
      <style:paragraph-properties fo:line-height="0.649cm"/>
      <style:text-properties style:font-name="Calibri" fo:font-size="12pt" fo:letter-spacing="-0.004cm" fo:font-weight="normal" officeooo:rsid="000b259a" officeooo:paragraph-rsid="000b259a" style:font-size-asian="12pt" style:font-weight-asian="normal" style:font-size-complex="12pt" style:font-weight-complex="normal"/>
    </style:style>
    <style:style style:name="P34" style:family="paragraph" style:parent-style-name="Heading_20_1">
      <style:paragraph-properties fo:line-height="0.649cm"/>
      <style:text-properties style:font-name="Calibri" fo:font-size="12pt" fo:letter-spacing="-0.004cm" fo:font-weight="normal" officeooo:rsid="000b259a" officeooo:paragraph-rsid="000bb415" style:font-size-asian="12pt" style:font-weight-asian="normal" style:font-size-complex="12pt" style:font-weight-complex="normal"/>
    </style:style>
    <style:style style:name="P35" style:family="paragraph" style:parent-style-name="Heading_20_1">
      <style:paragraph-properties fo:line-height="0.649cm"/>
      <style:text-properties style:font-name="Calibri" fo:font-size="12pt" fo:letter-spacing="-0.004cm" fo:font-weight="normal" officeooo:rsid="000b259a" officeooo:paragraph-rsid="000e6f5d" style:font-size-asian="12pt" style:font-weight-asian="normal" style:font-size-complex="12pt" style:font-weight-complex="normal"/>
    </style:style>
    <style:style style:name="P36" style:family="paragraph" style:parent-style-name="Heading_20_1" style:list-style-name="L6">
      <style:paragraph-properties fo:line-height="0.649cm"/>
      <style:text-properties style:font-name="Calibri" fo:font-size="12pt" fo:letter-spacing="-0.004cm" fo:font-weight="bold" style:font-size-asian="12pt" style:font-weight-asian="bold" style:font-size-complex="12pt" style:font-weight-complex="bold"/>
    </style:style>
    <style:style style:name="P37" style:family="paragraph" style:parent-style-name="Heading_20_1" style:list-style-name="L8">
      <style:paragraph-properties fo:line-height="0.649cm"/>
      <style:text-properties style:font-name="Calibri" fo:font-size="12pt" fo:letter-spacing="-0.004cm" fo:font-weight="bold" officeooo:rsid="000b259a" officeooo:paragraph-rsid="000b259a" style:font-size-asian="12pt" style:font-weight-asian="bold" style:font-size-complex="12pt" style:font-weight-complex="bold"/>
    </style:style>
    <style:style style:name="P38" style:family="paragraph" style:parent-style-name="Heading_20_1" style:list-style-name="L6">
      <style:paragraph-properties fo:line-height="0.649cm"/>
      <style:text-properties fo:font-size="16pt" fo:font-weight="bold" style:font-size-asian="16pt" style:font-weight-asian="bold" style:font-size-complex="16pt" style:font-weight-complex="bold"/>
    </style:style>
    <style:style style:name="P39" style:family="paragraph" style:parent-style-name="Heading_20_1" style:list-style-name="L6">
      <style:paragraph-properties fo:line-height="0.649cm"/>
      <style:text-properties officeooo:paragraph-rsid="000b259a"/>
    </style:style>
    <style:style style:name="P40" style:family="paragraph" style:parent-style-name="Heading_20_1" style:list-style-name="L7">
      <style:paragraph-properties fo:line-height="0.649cm"/>
      <style:text-properties officeooo:paragraph-rsid="000bb415"/>
    </style:style>
    <style:style style:name="P41" style:family="paragraph" style:parent-style-name="Heading_20_1" style:list-style-name="L8">
      <style:paragraph-properties fo:line-height="0.649cm"/>
      <style:text-properties fo:font-size="14pt" fo:font-weight="bold" officeooo:rsid="000b259a" officeooo:paragraph-rsid="000b259a" style:font-size-asian="14pt" style:font-weight-asian="bold" style:font-size-complex="14pt" style:font-weight-complex="bold"/>
    </style:style>
    <style:style style:name="P42" style:family="paragraph" style:parent-style-name="Heading_20_1">
      <style:paragraph-properties fo:margin-top="0.453cm" fo:margin-bottom="0cm" style:contextual-spacing="false"/>
      <style:text-properties fo:font-size="14pt" officeooo:paragraph-rsid="0007b641" style:font-size-asian="14pt" style:font-size-complex="14pt"/>
    </style:style>
    <style:style style:name="P43" style:family="paragraph" style:parent-style-name="Heading_20_1">
      <style:paragraph-properties fo:margin-top="0.102cm" fo:margin-bottom="0cm" style:contextual-spacing="false"/>
      <style:text-properties fo:font-size="14pt" style:font-size-asian="14pt" style:font-size-complex="14pt"/>
    </style:style>
    <style:style style:name="P44" style:family="paragraph" style:parent-style-name="Heading_20_1">
      <style:paragraph-properties fo:line-height="0.649cm"/>
      <style:text-properties fo:font-size="14pt" style:text-underline-style="solid" style:text-underline-width="auto" style:text-underline-color="font-color" style:font-size-asian="14pt" style:font-size-complex="14pt"/>
    </style:style>
    <style:style style:name="P45" style:family="paragraph" style:parent-style-name="Heading_20_1">
      <style:paragraph-properties fo:margin-top="0.099cm" fo:margin-bottom="0cm" style:contextual-spacing="false"/>
      <style:text-properties fo:font-size="14pt" fo:letter-spacing="-0.004cm" style:text-underline-style="solid" style:text-underline-width="auto" style:text-underline-color="font-color" style:font-size-asian="14pt" style:font-size-complex="14pt"/>
    </style:style>
    <style:style style:name="P46" style:family="paragraph" style:parent-style-name="Heading_20_1">
      <style:paragraph-properties fo:margin-left="0.247cm"/>
      <style:text-properties style:font-name="Calibri1" officeooo:paragraph-rsid="00148504"/>
    </style:style>
    <style:style style:name="P47" style:family="paragraph" style:parent-style-name="Heading_20_1">
      <style:paragraph-properties fo:margin-left="0.247cm"/>
      <style:text-properties style:font-name="Calibri1" fo:font-size="12pt" officeooo:paragraph-rsid="00148504" style:font-size-asian="12pt" style:font-size-complex="12pt"/>
    </style:style>
    <style:style style:name="P48" style:family="paragraph" style:parent-style-name="Heading_20_1">
      <style:paragraph-properties fo:line-height="0.649cm"/>
      <style:text-properties style:font-name="Calibri1" fo:font-size="12pt" fo:letter-spacing="-0.004cm" style:text-underline-style="none" fo:font-weight="normal" officeooo:rsid="000b259a" officeooo:paragraph-rsid="000f4d92" style:font-size-asian="12pt" style:font-weight-asian="normal" style:font-size-complex="12pt" style:font-weight-complex="normal"/>
    </style:style>
    <style:style style:name="P49" style:family="paragraph" style:parent-style-name="Heading_20_1">
      <style:paragraph-properties fo:margin-top="0.099cm" fo:margin-bottom="0cm" style:contextual-spacing="false"/>
      <style:text-properties style:font-name="Calibri1" fo:font-size="12pt" fo:letter-spacing="-0.004cm" style:font-size-asian="12pt" style:font-size-complex="12pt"/>
    </style:style>
    <style:style style:name="P50" style:family="paragraph" style:parent-style-name="Heading_20_1">
      <style:paragraph-properties fo:margin-top="0.099cm" fo:margin-bottom="0cm" style:contextual-spacing="false"/>
      <style:text-properties style:font-name="Calibri1" fo:font-size="12pt" fo:letter-spacing="-0.004cm" fo:font-weight="normal" style:font-size-asian="12pt" style:font-weight-asian="normal" style:font-size-complex="12pt" style:font-weight-complex="normal"/>
    </style:style>
    <style:style style:name="P51" style:family="paragraph" style:parent-style-name="Heading_20_1">
      <style:paragraph-properties fo:margin-top="0.099cm" fo:margin-bottom="0cm" style:contextual-spacing="false"/>
      <style:text-properties style:font-name="Calibri1" fo:font-size="12pt" fo:letter-spacing="-0.004cm" fo:font-weight="bold" officeooo:rsid="00111c38" officeooo:paragraph-rsid="00111c38" style:font-size-asian="12pt" style:font-weight-asian="bold" style:font-size-complex="12pt" style:font-weight-complex="bold"/>
    </style:style>
    <style:style style:name="P52" style:family="paragraph" style:parent-style-name="Heading_20_1" style:list-style-name="L9">
      <style:paragraph-properties fo:margin-top="0.099cm" fo:margin-bottom="0cm" style:contextual-spacing="false"/>
      <style:text-properties style:font-name="Calibri1" fo:font-size="14pt" fo:letter-spacing="-0.004cm" style:font-size-asian="14pt" style:font-size-complex="14pt"/>
    </style:style>
    <style:style style:name="P53" style:family="paragraph" style:parent-style-name="Heading_20_1" style:list-style-name="L11">
      <style:paragraph-properties fo:margin-top="0.099cm" fo:margin-bottom="0cm" style:contextual-spacing="false"/>
      <style:text-properties style:font-name="Calibri1" fo:font-size="14pt" fo:letter-spacing="-0.004cm" style:font-size-asian="14pt" style:font-size-complex="14pt"/>
    </style:style>
    <style:style style:name="P54" style:family="paragraph" style:parent-style-name="Heading_20_1" style:list-style-name="L10">
      <style:paragraph-properties fo:margin-top="0.099cm" fo:margin-bottom="0cm" style:contextual-spacing="false"/>
      <style:text-properties style:font-name="Calibri1" fo:font-size="14pt" fo:letter-spacing="-0.004cm" fo:font-weight="bold" style:font-size-asian="14pt" style:font-weight-asian="bold" style:font-size-complex="14pt" style:font-weight-complex="bold"/>
    </style:style>
    <style:style style:name="P55" style:family="paragraph" style:parent-style-name="Heading_20_1">
      <style:paragraph-properties fo:line-height="0.649cm"/>
      <style:text-properties fo:font-size="12pt" fo:font-weight="normal" style:font-size-asian="12pt" style:font-weight-asian="normal" style:font-size-complex="12pt" style:font-weight-complex="normal"/>
    </style:style>
    <style:style style:name="P56" style:family="paragraph" style:parent-style-name="Heading_20_1">
      <style:paragraph-properties fo:line-height="0.649cm"/>
      <style:text-properties fo:font-size="12pt" fo:font-weight="normal" officeooo:rsid="000b259a" officeooo:paragraph-rsid="000b259a" style:font-size-asian="12pt" style:font-weight-asian="normal" style:font-size-complex="12pt" style:font-weight-complex="normal"/>
    </style:style>
    <style:style style:name="P57" style:family="paragraph" style:parent-style-name="Heading_20_1">
      <style:paragraph-properties fo:line-height="0.649cm"/>
      <style:text-properties fo:font-size="12pt" fo:font-weight="bold" style:font-size-asian="12pt" style:font-weight-asian="bold" style:font-size-complex="12pt" style:font-weight-complex="bold"/>
    </style:style>
    <style:style style:name="P58" style:family="paragraph" style:parent-style-name="Heading_20_1">
      <style:paragraph-properties fo:line-height="0.649cm"/>
      <style:text-properties fo:font-size="12pt" fo:font-weight="bold" officeooo:rsid="000b259a" officeooo:paragraph-rsid="000b259a" style:font-size-asian="12pt" style:font-weight-asian="bold" style:font-size-complex="12pt" style:font-weight-complex="bold"/>
    </style:style>
    <style:style style:name="P59" style:family="paragraph" style:parent-style-name="Heading_20_2" style:list-style-name="WWNum2">
      <style:paragraph-properties fo:margin-left="0.254cm" fo:text-align="justify" style:justify-single-word="false" fo:text-indent="-0.252cm" style:auto-text-indent="false">
        <style:tab-stops>
          <style:tab-stop style:position="0.254cm"/>
        </style:tab-stops>
      </style:paragraph-properties>
    </style:style>
    <style:style style:name="P60" style:family="paragraph" style:parent-style-name="List_20_Paragraph" style:list-style-name="WWNum2">
      <style:paragraph-properties fo:margin-left="0.002cm" fo:margin-right="0.242cm" fo:margin-top="0.002cm" fo:margin-bottom="0cm" style:contextual-spacing="false" fo:text-align="justify" style:justify-single-word="false" fo:text-indent="0cm" style:auto-text-indent="false">
        <style:tab-stops>
          <style:tab-stop style:position="0.399cm"/>
        </style:tab-stops>
      </style:paragraph-properties>
      <style:text-properties style:font-name="Calibri1" fo:font-size="12pt" fo:font-weight="bold" style:font-size-asian="12pt" style:font-weight-asian="bold" style:font-size-complex="12pt" style:font-weight-complex="bold"/>
    </style:style>
    <style:style style:name="P61" style:family="paragraph" style:parent-style-name="List_20_Paragraph" style:list-style-name="WWNum2">
      <style:paragraph-properties fo:margin-left="0.002cm" fo:margin-right="0.243cm" fo:text-align="justify" style:justify-single-word="false" fo:text-indent="0cm" style:auto-text-indent="false">
        <style:tab-stops>
          <style:tab-stop style:position="0.407cm"/>
        </style:tab-stops>
      </style:paragraph-properties>
      <style:text-properties style:font-name="Calibri1" fo:font-size="12pt" fo:font-weight="bold" style:font-size-asian="12pt" style:font-weight-asian="bold" style:font-size-complex="12pt" style:font-weight-complex="bold"/>
    </style:style>
    <style:style style:name="P62" style:family="paragraph" style:parent-style-name="Standard">
      <style:paragraph-properties fo:margin-left="1.681cm" fo:margin-right="1.734cm" fo:line-height="0.445cm" fo:text-align="center" style:justify-single-word="false"/>
    </style:style>
    <style:style style:name="P63" style:family="paragraph" style:parent-style-name="Standard">
      <style:paragraph-properties fo:margin-right="0.104cm" fo:margin-top="0.051cm" fo:margin-bottom="0cm" style:contextual-spacing="false" fo:text-align="center" style:justify-single-word="false"/>
    </style:style>
    <style:style style:name="P64" style:family="paragraph" style:parent-style-name="Standard">
      <style:paragraph-properties fo:margin-left="1.626cm" fo:margin-right="1.734cm" fo:margin-top="0.012cm" fo:margin-bottom="0cm" style:contextual-spacing="false" fo:text-align="center" style:justify-single-word="false"/>
    </style:style>
    <style:style style:name="P65" style:family="paragraph" style:parent-style-name="Standard">
      <style:paragraph-properties fo:margin-left="1.503cm" fo:margin-right="1.734cm" fo:text-align="center" style:justify-single-word="false"/>
    </style:style>
    <style:style style:name="P66" style:family="paragraph" style:parent-style-name="Standard">
      <style:paragraph-properties fo:margin-left="4.011cm" fo:margin-right="5.547cm" fo:margin-top="0.002cm" fo:margin-bottom="0cm" style:contextual-spacing="false" fo:text-align="center" style:justify-single-word="false" fo:text-indent="-0.021cm" style:auto-text-indent="false"/>
    </style:style>
    <style:style style:name="P67" style:family="paragraph" style:parent-style-name="Standard">
      <style:paragraph-properties fo:margin-left="3.634cm" fo:margin-right="5.188cm" fo:margin-top="0.002cm" fo:margin-bottom="0cm" style:contextual-spacing="false" fo:text-align="center" style:justify-single-word="false"/>
    </style:style>
    <style:style style:name="P68" style:family="paragraph" style:parent-style-name="Standard">
      <style:paragraph-properties fo:margin-left="0.236cm" fo:margin-right="1.774cm" fo:margin-top="0.086cm" fo:margin-bottom="0cm" style:contextual-spacing="false" fo:text-align="center" style:justify-single-word="false"/>
    </style:style>
    <style:style style:name="P69" style:family="paragraph" style:parent-style-name="Standard">
      <style:paragraph-properties fo:margin-left="0.236cm" fo:margin-right="1.734cm" fo:text-align="center" style:justify-single-word="false"/>
    </style:style>
    <style:style style:name="P70" style:family="paragraph" style:parent-style-name="Standard">
      <style:paragraph-properties fo:margin-left="4.011cm" fo:margin-right="5.547cm" fo:margin-top="0.002cm" fo:margin-bottom="0cm" style:contextual-spacing="false" fo:text-align="center" style:justify-single-word="false" fo:text-indent="-0.021cm" style:auto-text-indent="false"/>
      <style:text-properties officeooo:paragraph-rsid="00140e54"/>
    </style:style>
    <style:style style:name="P71" style:family="paragraph" style:parent-style-name="Standard">
      <style:paragraph-properties fo:margin-left="-0.002cm" fo:margin-right="1.506cm" fo:line-height="0.561cm" fo:text-align="center" style:justify-single-word="false"/>
    </style:style>
    <style:style style:name="P72" style:family="paragraph" style:parent-style-name="Standard">
      <style:paragraph-properties fo:margin-left="0.236cm" fo:margin-right="1.739cm" fo:line-height="0.601cm" fo:text-align="center" style:justify-single-word="false"/>
    </style:style>
    <style:style style:name="P73" style:family="paragraph" style:parent-style-name="Text_20_body">
      <style:paragraph-properties fo:margin-left="0.106cm" fo:line-height="0.466cm"/>
    </style:style>
    <style:style style:name="P74" style:family="paragraph" style:parent-style-name="Text_20_body">
      <style:paragraph-properties fo:line-height="5%"/>
      <style:text-properties fo:font-size="10pt" style:font-size-asian="10pt"/>
    </style:style>
    <style:style style:name="P75" style:family="paragraph" style:parent-style-name="Text_20_body">
      <style:paragraph-properties fo:margin-top="0.055cm" fo:margin-bottom="0cm" style:contextual-spacing="false"/>
      <style:text-properties fo:font-size="10pt" style:font-size-asian="10pt"/>
    </style:style>
    <style:style style:name="P76" style:family="paragraph" style:parent-style-name="Text_20_body">
      <style:paragraph-properties fo:margin-top="0.222cm" fo:margin-bottom="0cm" style:contextual-spacing="false"/>
      <style:text-properties fo:font-size="10pt" fo:font-weight="bold" style:font-size-asian="10pt" style:font-weight-asian="bold"/>
    </style:style>
    <style:style style:name="P77" style:family="paragraph" style:parent-style-name="Text_20_body">
      <style:paragraph-properties fo:margin-top="0.109cm" fo:margin-bottom="0cm" style:contextual-spacing="false"/>
      <style:text-properties fo:font-size="14pt" fo:font-weight="bold" style:font-size-asian="14pt" style:font-weight-asian="bold"/>
    </style:style>
    <style:style style:name="P78" style:family="paragraph" style:parent-style-name="Text_20_body" style:list-style-name="L1">
      <style:paragraph-properties fo:margin-top="0.453cm" fo:margin-bottom="0cm" style:contextual-spacing="false"/>
      <style:text-properties fo:font-size="14pt" officeooo:rsid="0009622f" officeooo:paragraph-rsid="0009622f" style:font-size-asian="14pt" style:font-size-complex="14pt"/>
    </style:style>
    <style:style style:name="P79" style:family="paragraph" style:parent-style-name="Text_20_body" style:list-style-name="L1">
      <style:paragraph-properties fo:margin-top="0.453cm" fo:margin-bottom="0cm" style:contextual-spacing="false"/>
      <style:text-properties fo:font-size="14pt" officeooo:rsid="0009622f" officeooo:paragraph-rsid="000a1795" style:font-size-asian="14pt" style:font-size-complex="14pt"/>
    </style:style>
    <style:style style:name="P80" style:family="paragraph" style:parent-style-name="Text_20_body" style:list-style-name="L2">
      <style:paragraph-properties fo:margin-top="0.453cm" fo:margin-bottom="0cm" style:contextual-spacing="false"/>
      <style:text-properties fo:font-size="14pt" officeooo:rsid="0009622f" officeooo:paragraph-rsid="0009622f" style:font-size-asian="14pt" style:font-size-complex="14pt"/>
    </style:style>
    <style:style style:name="P81" style:family="paragraph" style:parent-style-name="Text_20_body" style:list-style-name="L2">
      <style:paragraph-properties fo:margin-top="0.453cm" fo:margin-bottom="0cm" style:contextual-spacing="false"/>
      <style:text-properties fo:font-size="14pt" officeooo:rsid="0009622f" officeooo:paragraph-rsid="000a1795" style:font-size-asian="14pt" style:font-size-complex="14pt"/>
    </style:style>
    <style:style style:name="P82" style:family="paragraph" style:parent-style-name="Text_20_body" style:list-style-name="L3">
      <style:paragraph-properties fo:margin-top="0.453cm" fo:margin-bottom="0cm" style:contextual-spacing="false"/>
      <style:text-properties fo:font-size="14pt" officeooo:rsid="0009622f" officeooo:paragraph-rsid="000a1795" style:font-size-asian="14pt" style:font-size-complex="14pt"/>
    </style:style>
    <style:style style:name="P83" style:family="paragraph" style:parent-style-name="Text_20_body" style:list-style-name="L2">
      <style:paragraph-properties fo:margin-top="0.453cm" fo:margin-bottom="0cm" style:contextual-spacing="false"/>
      <style:text-properties fo:font-size="14pt" fo:font-weight="normal" officeooo:rsid="0009622f" officeooo:paragraph-rsid="000a1795" style:font-size-asian="14pt" style:font-weight-asian="normal" style:font-size-complex="14pt" style:font-weight-complex="normal"/>
    </style:style>
    <style:style style:name="P84" style:family="paragraph" style:parent-style-name="Text_20_body">
      <style:paragraph-properties fo:margin-top="0.046cm" fo:margin-bottom="0cm" style:contextual-spacing="false"/>
      <style:text-properties fo:font-weight="bold" style:font-weight-asian="bold"/>
    </style:style>
    <style:style style:name="P85" style:family="paragraph" style:parent-style-name="Text_20_body" style:list-style-name="L2">
      <style:paragraph-properties fo:margin-top="0.453cm" fo:margin-bottom="0cm" style:contextual-spacing="false"/>
      <style:text-properties officeooo:paragraph-rsid="000a1795"/>
    </style:style>
    <style:style style:name="P86" style:family="paragraph" style:parent-style-name="Text_20_body" style:list-style-name="L2">
      <style:paragraph-properties fo:margin-top="0.453cm" fo:margin-bottom="0cm" style:contextual-spacing="false"/>
      <style:text-properties officeooo:paragraph-rsid="000aa328"/>
    </style:style>
    <style:style style:name="P87" style:family="paragraph" style:parent-style-name="Text_20_body">
      <style:paragraph-properties fo:margin-top="0cm" fo:margin-bottom="0.499cm" style:contextual-spacing="false"/>
      <style:text-properties style:font-name="Calibri1" fo:font-size="14pt" style:font-size-asian="14pt" style:font-size-complex="14pt"/>
    </style:style>
    <style:style style:name="P88" style:family="paragraph" style:parent-style-name="Text_20_body">
      <style:paragraph-properties fo:margin-top="0cm" fo:margin-bottom="0.499cm" style:contextual-spacing="false"/>
      <style:text-properties style:font-name="Calibri1" fo:font-size="12pt" style:font-size-asian="12pt" style:font-size-complex="12pt"/>
    </style:style>
    <style:style style:name="P89" style:family="paragraph" style:parent-style-name="Text_20_body">
      <style:paragraph-properties fo:margin-top="0.346cm" fo:margin-bottom="0cm" style:contextual-spacing="false"/>
      <style:text-properties style:font-name="Calibri1" fo:font-size="12pt" style:font-size-asian="12pt" style:font-size-complex="12pt"/>
    </style:style>
    <style:style style:name="P90" style:family="paragraph" style:parent-style-name="Text_20_body">
      <style:paragraph-properties fo:margin-top="0.288cm" fo:margin-bottom="0cm" style:contextual-spacing="false"/>
      <style:text-properties style:font-name="Calibri1" fo:font-size="12pt" style:font-size-asian="12pt" style:font-size-complex="12pt"/>
    </style:style>
    <style:style style:name="P91" style:family="paragraph" style:parent-style-name="Text_20_body">
      <style:paragraph-properties fo:margin-top="0.293cm" fo:margin-bottom="0cm" style:contextual-spacing="false"/>
      <style:text-properties style:font-name="Calibri1" fo:font-size="12pt" style:font-size-asian="12pt" style:font-size-complex="12pt"/>
    </style:style>
    <style:style style:name="P92" style:family="paragraph" style:parent-style-name="Text_20_body" style:list-style-name="L4">
      <style:paragraph-properties fo:margin-top="0cm" fo:margin-bottom="0.499cm" style:contextual-spacing="false"/>
    </style:style>
    <style:style style:name="P93" style:family="paragraph" style:parent-style-name="Text_20_body">
      <style:paragraph-properties fo:margin-top="0cm" fo:margin-bottom="0.499cm" style:contextual-spacing="false"/>
      <style:text-properties fo:font-size="12pt" style:font-size-asian="12pt" style:font-size-complex="12pt"/>
    </style:style>
    <style:style style:name="P94"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weight="bold" style:font-weight-asian="bold"/>
    </style:style>
    <style:style style:name="T4" style:family="text">
      <style:text-properties fo:color="#0d0d0d" loext:opacity="100%" style:font-name="Calibri" fo:letter-spacing="-0.004cm"/>
    </style:style>
    <style:style style:name="T5" style:family="text">
      <style:text-properties fo:color="#0d0d0d" loext:opacity="100%" fo:letter-spacing="-0.004cm" fo:font-weight="bold" style:font-weight-asian="bold"/>
    </style:style>
    <style:style style:name="T6" style:family="text">
      <style:text-properties fo:color="#0d0d0d" loext:opacity="100%" fo:letter-spacing="-0.016cm" fo:font-weight="bold" style:font-weight-asian="bold"/>
    </style:style>
    <style:style style:name="T7" style:family="text">
      <style:text-properties fo:color="#0d0d0d" loext:opacity="100%" fo:letter-spacing="-0.012cm" fo:font-weight="bold" style:font-weight-asian="bold"/>
    </style:style>
    <style:style style:name="T8" style:family="text">
      <style:text-properties fo:color="#0d0d0d" loext:opacity="100%" fo:letter-spacing="-0.014cm" fo:font-weight="bold" style:font-weight-asian="bold"/>
    </style:style>
    <style:style style:name="T9" style:family="text">
      <style:text-properties fo:color="#0d0d0d" loext:opacity="100%" fo:font-size="14pt" fo:font-weight="bold" style:font-size-asian="14pt" style:font-weight-asian="bold"/>
    </style:style>
    <style:style style:name="T10" style:family="text">
      <style:text-properties fo:color="#0d0d0d" loext:opacity="100%" fo:font-size="14pt" fo:font-weight="bold" officeooo:rsid="0007b641" style:font-size-asian="14pt" style:font-weight-asian="bold"/>
    </style:style>
    <style:style style:name="T11" style:family="text">
      <style:text-properties fo:color="#0d0d0d" loext:opacity="100%" fo:font-size="14pt" fo:font-weight="bold" officeooo:rsid="00140e54" style:font-size-asian="14pt" style:font-weight-asian="bold"/>
    </style:style>
    <style:style style:name="T12" style:family="text">
      <style:text-properties fo:color="#0d0d0d" loext:opacity="100%" fo:font-size="14pt" fo:letter-spacing="-0.035cm" fo:font-weight="bold" officeooo:rsid="0007b641" style:font-size-asian="14pt" style:font-weight-asian="bold"/>
    </style:style>
    <style:style style:name="T13" style:family="text">
      <style:text-properties fo:color="#0d0d0d" loext:opacity="100%" fo:font-size="14pt" fo:letter-spacing="-0.035cm" fo:font-weight="bold" officeooo:rsid="00140e54" style:font-size-asian="14pt" style:font-weight-asian="bold"/>
    </style:style>
    <style:style style:name="T14" style:family="text">
      <style:text-properties fo:color="#0d0d0d" loext:opacity="100%" fo:font-size="15pt" fo:font-weight="bold" style:font-size-asian="15pt" style:font-weight-asian="bold"/>
    </style:style>
    <style:style style:name="T15" style:family="text">
      <style:text-properties fo:color="#0d0d0d" loext:opacity="100%" fo:font-size="15pt" fo:letter-spacing="-0.011cm" fo:font-weight="bold" style:font-size-asian="15pt" style:font-weight-asian="bold"/>
    </style:style>
    <style:style style:name="T16" style:family="text">
      <style:text-properties fo:color="#0d0d0d" loext:opacity="100%" fo:font-size="15pt" fo:letter-spacing="-0.004cm" fo:font-weight="bold" style:font-size-asian="15pt" style:font-weight-asian="bold"/>
    </style:style>
    <style:style style:name="T17" style:family="text">
      <style:text-properties style:font-name="Calibri"/>
    </style:style>
    <style:style style:name="T18" style:family="text">
      <style:text-properties style:font-name="Calibri" fo:letter-spacing="-0.018cm"/>
    </style:style>
    <style:style style:name="T19" style:family="text">
      <style:text-properties style:font-name="Calibri" fo:letter-spacing="-0.004cm"/>
    </style:style>
    <style:style style:name="T20" style:family="text">
      <style:text-properties style:font-name="Calibri" fo:letter-spacing="-0.004cm" fo:font-weight="normal" style:font-weight-asian="normal" style:font-weight-complex="normal"/>
    </style:style>
    <style:style style:name="T21" style:family="text">
      <style:text-properties style:font-name="Calibri" fo:font-size="14pt" fo:letter-spacing="-0.004cm" fo:font-weight="normal" style:font-size-asian="14pt" style:font-weight-asian="normal" style:font-size-complex="14pt" style:font-weight-complex="normal"/>
    </style:style>
    <style:style style:name="T22" style:family="text">
      <style:text-properties style:font-name="Calibri" fo:font-size="14pt" fo:letter-spacing="-0.004cm" fo:font-weight="normal" officeooo:rsid="000b259a" style:font-size-asian="14pt" style:font-weight-asian="normal" style:font-size-complex="14pt" style:font-weight-complex="normal"/>
    </style:style>
    <style:style style:name="T23" style:family="text">
      <style:text-properties style:font-name="Calibri" fo:font-size="14pt" fo:letter-spacing="-0.004cm" style:font-size-asian="14pt" style:font-size-complex="14pt"/>
    </style:style>
    <style:style style:name="T24" style:family="text">
      <style:text-properties style:font-name="Calibri" fo:font-size="14pt" fo:letter-spacing="-0.004cm" fo:font-weight="bold" officeooo:rsid="000b259a" style:font-size-asian="14pt" style:font-weight-asian="bold" style:font-size-complex="14pt" style:font-weight-complex="bold"/>
    </style:style>
    <style:style style:name="T25" style:family="text">
      <style:text-properties style:font-name="Calibri" fo:font-size="16pt" fo:font-weight="bold" officeooo:rsid="000e6f5d" style:font-size-asian="14pt" style:font-weight-asian="bold" style:font-size-complex="16pt" style:font-weight-complex="bold"/>
    </style:style>
    <style:style style:name="T26" style:family="text">
      <style:text-properties style:font-name="Calibri" fo:font-size="16pt" fo:font-weight="normal" officeooo:rsid="000e6f5d" style:font-size-asian="14pt" style:font-weight-asian="normal" style:font-size-complex="16pt" style:font-weight-complex="normal"/>
    </style:style>
    <style:style style:name="T27" style:family="text">
      <style:text-properties style:font-name="Calibri" fo:font-size="12pt" fo:letter-spacing="-0.004cm" style:font-size-asian="12pt" style:font-size-complex="12pt"/>
    </style:style>
    <style:style style:name="T28" style:family="text">
      <style:text-properties style:font-name="Calibri" fo:font-size="12pt" fo:letter-spacing="-0.004cm" fo:font-weight="normal" style:font-size-asian="12pt" style:font-weight-asian="normal" style:font-size-complex="12pt" style:font-weight-complex="normal"/>
    </style:style>
    <style:style style:name="T29" style:family="text">
      <style:text-properties fo:color="#00007c" loext:opacity="100%"/>
    </style:style>
    <style:style style:name="T30" style:family="text">
      <style:text-properties fo:color="#00007c" loext:opacity="100%" fo:letter-spacing="-0.007cm"/>
    </style:style>
    <style:style style:name="T31" style:family="text">
      <style:text-properties fo:color="#00007c" loext:opacity="100%" fo:letter-spacing="-0.039cm"/>
    </style:style>
    <style:style style:name="T32" style:family="text">
      <style:text-properties fo:color="#00007c" loext:opacity="100%" fo:letter-spacing="-0.021cm"/>
    </style:style>
    <style:style style:name="T33" style:family="text">
      <style:text-properties fo:color="#00007c" loext:opacity="100%" fo:letter-spacing="-0.018cm"/>
    </style:style>
    <style:style style:name="T34" style:family="text">
      <style:text-properties fo:color="#00007c" loext:opacity="100%" fo:letter-spacing="-0.023cm"/>
    </style:style>
    <style:style style:name="T35" style:family="text">
      <style:text-properties fo:color="#00007c" loext:opacity="100%" fo:letter-spacing="-0.025cm"/>
    </style:style>
    <style:style style:name="T36" style:family="text">
      <style:text-properties fo:color="#00007c" loext:opacity="100%" fo:letter-spacing="-0.026cm"/>
    </style:style>
    <style:style style:name="T37" style:family="text">
      <style:text-properties fo:color="#00007c" loext:opacity="100%" fo:letter-spacing="-0.004cm"/>
    </style:style>
    <style:style style:name="T38" style:family="text">
      <style:text-properties fo:color="#00007c" loext:opacity="100%" style:font-name="Arial Black" fo:font-size="14pt" style:font-size-asian="14pt"/>
    </style:style>
    <style:style style:name="T39" style:family="text">
      <style:text-properties fo:color="#00007c" loext:opacity="100%" style:font-name="Arial Black" fo:font-size="14pt" fo:letter-spacing="-0.041cm" style:font-size-asian="14pt"/>
    </style:style>
    <style:style style:name="T40" style:family="text">
      <style:text-properties fo:color="#00007c" loext:opacity="100%" style:font-name="Arial Black" fo:font-size="14pt" fo:letter-spacing="-0.041cm" officeooo:rsid="00143e35" style:font-size-asian="14pt"/>
    </style:style>
    <style:style style:name="T41" style:family="text">
      <style:text-properties fo:color="#00007c" loext:opacity="100%" style:font-name="Arial Black" fo:font-size="14pt" fo:letter-spacing="-0.026cm" style:font-size-asian="14pt"/>
    </style:style>
    <style:style style:name="T42" style:family="text">
      <style:text-properties fo:color="#00007c" loext:opacity="100%" style:font-name="Arial Black" fo:font-size="14pt" fo:letter-spacing="-0.032cm" style:font-size-asian="14pt"/>
    </style:style>
    <style:style style:name="T43" style:family="text">
      <style:text-properties fo:color="#00007c" loext:opacity="100%" style:font-name="Arial Black" fo:font-size="14pt" fo:letter-spacing="-0.004cm" officeooo:rsid="0012e7b9" style:font-size-asian="14pt"/>
    </style:style>
    <style:style style:name="T44" style:family="text">
      <style:text-properties fo:color="#00007c" loext:opacity="100%" style:font-name="Arial Black" fo:font-size="14pt" fo:letter-spacing="-0.004cm" officeooo:rsid="00143e35" style:font-size-asian="14pt"/>
    </style:style>
    <style:style style:name="T45" style:family="text">
      <style:text-properties fo:color="#00007c" loext:opacity="100%" fo:font-size="14pt" fo:font-weight="bold" style:font-size-asian="14pt" style:font-weight-asian="bold"/>
    </style:style>
    <style:style style:name="T46" style:family="text">
      <style:text-properties fo:color="#00007c" loext:opacity="100%" fo:font-size="14pt" fo:letter-spacing="-0.034cm" fo:font-weight="bold" style:font-size-asian="14pt" style:font-weight-asian="bold"/>
    </style:style>
    <style:style style:name="T47" style:family="text">
      <style:text-properties fo:color="#00007c" loext:opacity="100%" fo:font-size="14pt" fo:letter-spacing="-0.032cm" fo:font-weight="bold" style:font-size-asian="14pt" style:font-weight-asian="bold"/>
    </style:style>
    <style:style style:name="T48" style:family="text">
      <style:text-properties fo:color="#00007c" loext:opacity="100%" fo:font-size="14pt" fo:letter-spacing="-0.011cm" fo:font-weight="bold" style:font-size-asian="14pt" style:font-weight-asian="bold"/>
    </style:style>
    <style:style style:name="T49" style:family="text">
      <style:text-properties fo:color="#00007c" loext:opacity="100%" fo:font-size="14pt" fo:letter-spacing="-0.004cm" fo:font-weight="bold" style:font-size-asian="14pt" style:font-weight-asian="bold"/>
    </style:style>
    <style:style style:name="T50" style:family="text">
      <style:text-properties fo:color="#00007c" loext:opacity="100%" fo:font-size="14pt" fo:letter-spacing="-0.016cm" fo:font-weight="bold" style:font-size-asian="14pt" style:font-weight-asian="bold"/>
    </style:style>
    <style:style style:name="T51" style:family="text">
      <style:text-properties fo:color="#00007c" loext:opacity="100%" fo:font-size="13pt" fo:letter-spacing="-0.009cm" style:font-size-asian="13pt"/>
    </style:style>
    <style:style style:name="T52" style:family="text">
      <style:text-properties fo:color="#00007c" loext:opacity="100%" fo:font-size="13pt" fo:letter-spacing="0.002cm" style:font-size-asian="13pt"/>
    </style:style>
    <style:style style:name="T53" style:family="text">
      <style:text-properties fo:color="#00007c" loext:opacity="100%" fo:letter-spacing="-0.009cm"/>
    </style:style>
    <style:style style:name="T54" style:family="text">
      <style:text-properties fo:color="#00007c" loext:opacity="100%" fo:letter-spacing="-0.002cm"/>
    </style:style>
    <style:style style:name="T55" style:family="text">
      <style:text-properties fo:color="#00007c" loext:opacity="100%" fo:font-size="18pt" fo:font-weight="bold" style:font-size-asian="18pt" style:font-weight-asian="bold"/>
    </style:style>
    <style:style style:name="T56" style:family="text">
      <style:text-properties fo:color="#00007c" loext:opacity="100%" fo:font-size="18pt" fo:letter-spacing="-0.042cm" fo:font-weight="bold" style:font-size-asian="18pt" style:font-weight-asian="bold"/>
    </style:style>
    <style:style style:name="T57" style:family="text">
      <style:text-properties fo:color="#00007c" loext:opacity="100%" fo:font-size="18pt" fo:letter-spacing="-0.041cm" fo:font-weight="bold" style:font-size-asian="18pt" style:font-weight-asian="bold"/>
    </style:style>
    <style:style style:name="T58" style:family="text">
      <style:text-properties fo:color="#00007c" loext:opacity="100%" fo:font-size="18pt" fo:letter-spacing="-0.004cm" fo:font-weight="bold" style:font-size-asian="18pt" style:font-weight-asian="bold"/>
    </style:style>
    <style:style style:name="T59" style:family="text">
      <style:text-properties fo:color="#00007c" loext:opacity="100%" officeooo:rsid="0012e7b9"/>
    </style:style>
    <style:style style:name="T60" style:family="text">
      <style:text-properties fo:font-size="9pt" fo:font-style="italic" fo:font-weight="bold" style:font-size-asian="9pt" style:font-style-asian="italic" style:font-weight-asian="bold"/>
    </style:style>
    <style:style style:name="T61" style:family="text">
      <style:text-properties fo:font-size="9pt" fo:letter-spacing="-0.009cm" fo:font-style="italic" fo:font-weight="bold" style:font-size-asian="9pt" style:font-style-asian="italic" style:font-weight-asian="bold"/>
    </style:style>
    <style:style style:name="T62" style:family="text">
      <style:text-properties fo:font-size="9pt" fo:letter-spacing="-0.021cm" fo:font-style="italic" fo:font-weight="bold" style:font-size-asian="9pt" style:font-style-asian="italic" style:font-weight-asian="bold"/>
    </style:style>
    <style:style style:name="T63" style:family="text">
      <style:text-properties fo:font-size="9pt" fo:letter-spacing="-0.007cm" fo:font-style="italic" fo:font-weight="bold" style:font-size-asian="9pt" style:font-style-asian="italic" style:font-weight-asian="bold"/>
    </style:style>
    <style:style style:name="T64" style:family="text">
      <style:text-properties fo:font-size="9pt" fo:letter-spacing="-0.011cm" fo:font-style="italic" fo:font-weight="bold" style:font-size-asian="9pt" style:font-style-asian="italic" style:font-weight-asian="bold"/>
    </style:style>
    <style:style style:name="T65" style:family="text">
      <style:text-properties fo:font-size="9pt" fo:letter-spacing="-0.018cm" fo:font-style="italic" fo:font-weight="bold" style:font-size-asian="9pt" style:font-style-asian="italic" style:font-weight-asian="bold"/>
    </style:style>
    <style:style style:name="T66" style:family="text">
      <style:text-properties fo:font-size="9pt" fo:letter-spacing="-0.014cm" fo:font-style="italic" fo:font-weight="bold" style:font-size-asian="9pt" style:font-style-asian="italic" style:font-weight-asian="bold"/>
    </style:style>
    <style:style style:name="T67" style:family="text">
      <style:text-properties fo:font-size="9pt" fo:letter-spacing="-0.016cm" fo:font-style="italic" fo:font-weight="bold" style:font-size-asian="9pt" style:font-style-asian="italic" style:font-weight-asian="bold"/>
    </style:style>
    <style:style style:name="T68" style:family="text">
      <style:text-properties fo:font-size="9pt" fo:letter-spacing="-0.004cm" fo:font-style="italic" fo:font-weight="bold" style:font-size-asian="9pt" style:font-style-asian="italic" style:font-weight-asian="bold"/>
    </style:style>
    <style:style style:name="T69" style:family="text">
      <style:text-properties fo:letter-spacing="-0.048cm"/>
    </style:style>
    <style:style style:name="T70" style:family="text">
      <style:text-properties fo:letter-spacing="-0.034cm"/>
    </style:style>
    <style:style style:name="T71" style:family="text">
      <style:text-properties fo:letter-spacing="-0.041cm"/>
    </style:style>
    <style:style style:name="T72" style:family="text">
      <style:text-properties fo:letter-spacing="-0.004cm"/>
    </style:style>
    <style:style style:name="T73" style:family="text">
      <style:text-properties fo:letter-spacing="-0.004cm" fo:font-weight="normal" style:font-weight-asian="normal" style:font-weight-complex="normal"/>
    </style:style>
    <style:style style:name="T74" style:family="text">
      <style:text-properties fo:letter-spacing="-0.004cm" fo:font-weight="normal" officeooo:rsid="000a1795" style:font-weight-asian="normal" style:font-weight-complex="normal"/>
    </style:style>
    <style:style style:name="T75" style:family="text">
      <style:text-properties fo:letter-spacing="-0.004cm" officeooo:rsid="000a1795"/>
    </style:style>
    <style:style style:name="T76" style:family="text">
      <style:text-properties fo:letter-spacing="-0.004cm" officeooo:rsid="000b259a"/>
    </style:style>
    <style:style style:name="T77" style:family="text">
      <style:text-properties fo:letter-spacing="-0.004cm" style:text-underline-style="solid" style:text-underline-width="auto" style:text-underline-color="font-color"/>
    </style:style>
    <style:style style:name="T78" style:family="text">
      <style:text-properties fo:letter-spacing="-0.004cm" style:text-underline-style="none" fo:font-weight="normal" style:font-weight-asian="normal" style:font-weight-complex="normal"/>
    </style:style>
    <style:style style:name="T79" style:family="text">
      <style:text-properties style:font-name="Arial Black" fo:font-size="14pt" style:font-size-asian="14pt"/>
    </style:style>
    <style:style style:name="T80" style:family="text">
      <style:text-properties fo:font-size="14pt" fo:font-weight="bold" style:font-size-asian="14pt" style:font-weight-asian="bold"/>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fo:font-weight="bold" officeooo:rsid="000aa328" style:font-size-asian="14pt" style:font-weight-asian="bold" style:font-size-complex="14pt" style:font-weight-complex="bold"/>
    </style:style>
    <style:style style:name="T83" style:family="text">
      <style:text-properties fo:font-size="14pt" style:font-size-asian="14pt"/>
    </style:style>
    <style:style style:name="T84" style:family="text">
      <style:text-properties fo:font-size="14pt" style:font-size-asian="14pt" style:font-size-complex="14pt"/>
    </style:style>
    <style:style style:name="T85" style:family="text">
      <style:text-properties fo:font-size="14pt" fo:letter-spacing="-0.004cm" officeooo:rsid="000a1795" style:font-size-asian="14pt" style:font-size-complex="14pt"/>
    </style:style>
    <style:style style:name="T86" style:family="text">
      <style:text-properties fo:font-size="14pt" fo:letter-spacing="-0.004cm" fo:font-weight="bold" officeooo:rsid="000a1795" style:font-size-asian="14pt" style:font-weight-asian="bold" style:font-size-complex="14pt" style:font-weight-complex="bold"/>
    </style:style>
    <style:style style:name="T87" style:family="text">
      <style:text-properties fo:font-size="14pt" fo:letter-spacing="-0.004cm" style:text-underline-style="solid" style:text-underline-width="auto" style:text-underline-color="font-color" style:font-size-asian="14pt" style:font-size-complex="14pt"/>
    </style:style>
    <style:style style:name="T88" style:family="text">
      <style:text-properties fo:font-size="14pt" fo:font-weight="normal" style:font-size-asian="14pt" style:font-weight-asian="normal" style:font-size-complex="14pt" style:font-weight-complex="normal"/>
    </style:style>
    <style:style style:name="T89" style:family="text">
      <style:text-properties fo:color="#c00000" loext:opacity="100%" fo:font-size="14pt" fo:font-weight="bold" style:font-size-asian="14pt" style:font-weight-asian="bold"/>
    </style:style>
    <style:style style:name="T90" style:family="text">
      <style:text-properties fo:color="#c00000" loext:opacity="100%" fo:font-size="14pt" fo:font-weight="bold" officeooo:rsid="0012e7b9" style:font-size-asian="14pt" style:font-weight-asian="bold"/>
    </style:style>
    <style:style style:name="T91" style:family="text">
      <style:text-properties fo:color="#c00000" loext:opacity="100%" fo:font-size="14pt" fo:font-weight="bold" officeooo:rsid="00143e35" style:font-size-asian="14pt" style:font-weight-asian="bold"/>
    </style:style>
    <style:style style:name="T92" style:family="text">
      <style:text-properties fo:color="#c00000" loext:opacity="100%" fo:font-size="14pt" fo:letter-spacing="-0.004cm" fo:font-weight="bold" style:font-size-asian="14pt" style:font-weight-asian="bold"/>
    </style:style>
    <style:style style:name="T93" style:family="text">
      <style:text-properties fo:font-size="13pt" style:font-size-asian="13pt"/>
    </style:style>
    <style:style style:name="T94" style:family="text">
      <style:text-properties fo:color="#1f467a" loext:opacity="100%" fo:font-size="14pt" style:font-size-asian="14pt"/>
    </style:style>
    <style:style style:name="T95" style:family="text">
      <style:text-properties fo:color="#1f467a" loext:opacity="100%" fo:font-size="14pt" fo:letter-spacing="-0.035cm" style:font-size-asian="14pt"/>
    </style:style>
    <style:style style:name="T96" style:family="text">
      <style:text-properties fo:color="#1f467a" loext:opacity="100%" fo:font-size="14pt" fo:letter-spacing="-0.03cm" style:font-size-asian="14pt"/>
    </style:style>
    <style:style style:name="T97" style:family="text">
      <style:text-properties fo:color="#1f467a" loext:opacity="100%" fo:font-size="14pt" fo:letter-spacing="-0.026cm" style:font-size-asian="14pt"/>
    </style:style>
    <style:style style:name="T98" style:family="text">
      <style:text-properties fo:color="#1f467a" loext:opacity="100%" fo:font-size="14pt" fo:letter-spacing="-0.009cm" style:font-size-asian="14pt"/>
    </style:style>
    <style:style style:name="T99" style:family="text">
      <style:text-properties fo:font-size="15pt" fo:font-weight="bold" style:font-size-asian="15pt" style:font-weight-asian="bold"/>
    </style:style>
    <style:style style:name="T100" style:family="text">
      <style:text-properties fo:font-size="18pt" fo:font-weight="bold" style:font-size-asian="18pt" style:font-weight-asian="bold"/>
    </style:style>
    <style:style style:name="T101" style:family="text">
      <style:text-properties fo:letter-spacing="-0.011cm"/>
    </style:style>
    <style:style style:name="T102" style:family="text">
      <style:text-properties fo:letter-spacing="-0.011cm" style:text-underline-style="solid" style:text-underline-width="auto" style:text-underline-color="font-color"/>
    </style:style>
    <style:style style:name="T103" style:family="text">
      <style:text-properties fo:letter-spacing="-0.011cm" style:text-underline-style="solid" style:text-underline-width="auto" style:text-underline-color="font-color" officeooo:rsid="000aa328"/>
    </style:style>
    <style:style style:name="T104" style:family="text">
      <style:text-properties officeooo:rsid="0008466b"/>
    </style:style>
    <style:style style:name="T105" style:family="text">
      <style:text-properties officeooo:rsid="000aa328"/>
    </style:style>
    <style:style style:name="T106" style:family="text">
      <style:text-properties fo:font-weight="normal" style:font-weight-asian="normal" style:font-weight-complex="normal"/>
    </style:style>
    <style:style style:name="T107" style:family="text">
      <style:text-properties fo:font-weight="normal" officeooo:rsid="000e9802" style:font-weight-asian="normal" style:font-weight-complex="normal"/>
    </style:style>
    <style:style style:name="T108" style:family="text">
      <style:text-properties officeooo:rsid="000e6f5d"/>
    </style:style>
    <style:style style:name="T109" style:family="text">
      <style:text-properties officeooo:rsid="000e9802"/>
    </style:style>
    <style:style style:name="T110" style:family="text">
      <style:text-properties officeooo:rsid="000f4d92"/>
    </style:style>
    <style:style style:name="T111" style:family="text">
      <style:text-properties style:font-name="Calibri1"/>
    </style:style>
    <style:style style:name="T112" style:family="text">
      <style:text-properties style:font-name="Calibri1" fo:font-size="14pt" fo:letter-spacing="-0.004cm" style:font-size-asian="14pt" style:font-size-complex="14pt"/>
    </style:style>
    <style:style style:name="T113" style:family="text">
      <style:text-properties style:font-name="Calibri1" fo:font-size="14pt" fo:letter-spacing="-0.004cm" fo:font-weight="normal" style:font-size-asian="14pt" style:font-weight-asian="normal" style:font-size-complex="14pt" style:font-weight-complex="normal"/>
    </style:style>
    <style:style style:name="T114" style:family="text">
      <style:text-properties style:font-name="Calibri1" fo:font-size="14pt" fo:font-weight="normal" style:font-size-asian="14pt" style:font-weight-asian="normal" style:font-size-complex="14pt" style:font-weight-complex="normal"/>
    </style:style>
    <style:style style:name="T115" style:family="text">
      <style:text-properties style:font-name="Calibri1" fo:font-size="14pt" style:font-size-asian="14pt" style:font-size-complex="14pt"/>
    </style:style>
    <style:style style:name="T116" style:family="text">
      <style:text-properties style:font-name="Calibri1" fo:font-size="14pt" fo:font-weight="bold" style:font-size-asian="14pt" style:font-weight-asian="bold" style:font-size-complex="14pt" style:font-weight-complex="bold"/>
    </style:style>
    <style:style style:name="T117" style:family="text">
      <style:text-properties style:font-name="Calibri1" fo:letter-spacing="-0.004cm"/>
    </style:style>
    <style:style style:name="T118" style:family="text">
      <style:text-properties style:font-name="Calibri1" fo:letter-spacing="-0.004cm" style:text-underline-style="solid" style:text-underline-width="auto" style:text-underline-color="font-color"/>
    </style:style>
    <style:style style:name="T119" style:family="text">
      <style:text-properties style:font-name="Calibri1" fo:letter-spacing="-0.004cm" fo:font-weight="normal" style:font-weight-asian="normal" style:font-weight-complex="normal"/>
    </style:style>
    <style:style style:name="T120" style:family="text">
      <style:text-properties style:font-name="Calibri1" fo:font-weight="normal" style:font-weight-asian="normal" style:font-weight-complex="normal"/>
    </style:style>
    <style:style style:name="T121" style:family="text">
      <style:text-properties style:font-name="Calibri1" fo:font-size="12pt" fo:font-weight="normal" style:font-size-asian="12pt" style:font-weight-asian="normal" style:font-size-complex="12pt" style:font-weight-complex="normal"/>
    </style:style>
    <style:style style:name="T122" style:family="text">
      <style:text-properties style:font-name="Calibri1" fo:font-size="12pt" style:font-size-asian="12pt" style:font-size-complex="12pt"/>
    </style:style>
    <style:style style:name="T123" style:family="text">
      <style:text-properties style:font-name="Calibri1" fo:font-size="12pt" fo:letter-spacing="-0.004cm" fo:font-weight="normal" style:font-size-asian="12pt" style:font-weight-asian="normal" style:font-size-complex="12pt" style:font-weight-complex="normal"/>
    </style:style>
    <style:style style:name="T124" style:family="text">
      <style:text-properties style:font-name="Calibri1" fo:font-size="12pt" fo:letter-spacing="-0.004cm" style:font-size-asian="12pt" style:font-size-complex="12pt"/>
    </style:style>
    <style:style style:name="T125" style:family="text">
      <style:text-properties style:font-name="Calibri1" fo:font-size="12pt" fo:font-weight="bold" style:font-size-asian="12pt" style:font-weight-asian="bold" style:font-size-complex="12pt" style:font-weight-complex="bold"/>
    </style:style>
    <style:style style:name="T126" style:family="text">
      <style:text-properties style:font-name="Calibri1" fo:font-weight="bold" style:font-weight-asian="bold" style:font-weight-complex="bold"/>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695cm" fo:text-indent="-0.635cm" fo:margin-left="1.69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3cm" fo:text-indent="-0.635cm" fo:margin-left="2.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65cm" fo:text-indent="-0.635cm" fo:margin-left="2.96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cm" fo:text-indent="-0.635cm" fo:margin-left="3.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35cm" fo:text-indent="-0.635cm" fo:margin-left="4.2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7cm" fo:text-indent="-0.635cm" fo:margin-left="4.8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05cm" fo:text-indent="-0.635cm" fo:margin-left="5.50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4cm" fo:text-indent="-0.635cm" fo:margin-left="6.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75cm" fo:text-indent="-0.635cm" fo:margin-left="6.77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1cm" fo:text-indent="-0.635cm" fo:margin-left="7.41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95cm" fo:text-indent="-0.635cm" fo:margin-left="1.69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cm" fo:text-indent="-0.635cm" fo:margin-left="7.41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0.517cm" fo:min-width="7.646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517cm" fo:min-width="7.646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496cm" fo:min-width="0.46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96cm" fo:min-width="0.46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24" text:outline-level="1"><text:span text:style-name="T30">SRI</text:span><text:span text:style-name="T31"> </text:span><text:span text:style-name="T30">SIDDHARTHA</text:span><text:span text:style-name="T32"> </text:span><text:span text:style-name="T30">ACADEMY</text:span><text:span text:style-name="T33"> </text:span><text:span text:style-name="T30">OF</text:span><text:span text:style-name="T34"> </text:span><text:span text:style-name="T30">HIGHER</text:span><text:span text:style-name="T35"> </text:span><text:span text:style-name="T30">EDUCATION</text:span></text:h>
        <text:p text:style-name="P62" loext:marker-style-name="T60"><text:span text:style-name="T3">(</text:span><text:span text:style-name="T60">Declared</text:span><text:span text:style-name="T61"> </text:span><text:span text:style-name="T60">as</text:span><text:span text:style-name="T62"> </text:span><text:span text:style-name="T60">Deemed</text:span><text:span text:style-name="T63"> </text:span><text:span text:style-name="T60">to</text:span><text:span text:style-name="T61"> </text:span><text:span text:style-name="T60">be</text:span><text:span text:style-name="T64"> </text:span><text:span text:style-name="T60">University</text:span><text:span text:style-name="T65"> </text:span><text:span text:style-name="T60">Under</text:span><text:span text:style-name="T66"> </text:span><text:span text:style-name="T60">Section</text:span><text:span text:style-name="T66"> </text:span><text:span text:style-name="T60">3</text:span><text:span text:style-name="T63"> </text:span><text:span text:style-name="T60">of</text:span><text:span text:style-name="T66"> </text:span><text:span text:style-name="T60">the</text:span><text:span text:style-name="T67"> </text:span><text:span text:style-name="T60">UGC</text:span><text:span text:style-name="T67"> </text:span><text:span text:style-name="T60">Act,</text:span><text:span text:style-name="T68"> 1956)</text:span></text:p>
        <text:p text:style-name="Title">Sri<text:span text:style-name="T69"> </text:span>Siddhartha<text:span text:style-name="T70"> </text:span>Institute<text:span text:style-name="T71"> </text:span>of<text:span text:style-name="T71"> </text:span><text:span text:style-name="T72">Technology</text:span></text:p>
        <text:p text:style-name="P9"><text:span text:style-name="T59">KUNIGAL ROAD, MARALURU</text:span><text:span text:style-name="T29">,</text:span><text:span text:style-name="T36"> </text:span><text:span text:style-name="T29">TUMAKURU</text:span><text:span text:style-name="T36"> </text:span><text:span text:style-name="T29">–</text:span><text:span text:style-name="T36"> </text:span><text:span text:style-name="T29">572107 </text:span><text:span text:style-name="T37">KARNATAKA</text:span></text:p>
        <text:p text:style-name="P75" loext:marker-style-name="T1"><draw:frame draw:style-name="fr3" draw:name="Image 3" text:anchor-type="char" svg:x="9.234cm" svg:y="0.503cm" svg:width="3.156cm" svg:height="3.156cm" draw:z-index="48"><draw:image xlink:href="Pictures/10000000000000E1000000E193AC4DFC.jpg" xlink:type="simple" xlink:show="embed" xlink:actuate="onLoad" draw:mime-type="image/jpeg"/></draw:frame></text:p>
        <text:p text:style-name="P63" loext:marker-style-name="T79"><text:span text:style-name="T40">Hobby</text:span><text:span text:style-name="T39"> </text:span><text:span text:style-name="T38">Project</text:span><text:span text:style-name="T42"> </text:span><text:span text:style-name="T43">Report </text:span><text:span text:style-name="T44">on</text:span></text:p>
        <text:p text:style-name="P64" loext:marker-style-name="T80"><text:span text:style-name="T89">“</text:span><text:span text:style-name="T90">Digit Recognition </text:span><text:span text:style-name="T91">with Deep learning</text:span><text:span text:style-name="T90"> using MNIST and EMNIST Datasets</text:span><text:span text:style-name="T92">”</text:span></text:p>
        <text:p text:style-name="P65" loext:marker-style-name="T93"><text:span text:style-name="T51"/></text:p>
        <text:p text:style-name="P65" loext:marker-style-name="T93"><text:span text:style-name="T51">Submitted</text:span><text:span text:style-name="T52"> </text:span><text:span text:style-name="T51">by:</text:span></text:p>
        <text:p text:style-name="P66" loext:marker-style-name="T80"><text:span text:style-name="T12">MOHAMMED ROSHAN </text:span><text:span text:style-name="T9">(</text:span><text:span text:style-name="T10">23DS032</text:span><text:span text:style-name="T9">)</text:span></text:p>
        <text:p text:style-name="P70"><text:span text:style-name="T13">KARTHIK GOWDA</text:span><text:span text:style-name="T12"> </text:span><text:span text:style-name="T9">(</text:span><text:span text:style-name="T10">2</text:span><text:span text:style-name="T11">4</text:span><text:span text:style-name="T10">DS</text:span><text:span text:style-name="T11">40 </text:span><text:span text:style-name="T9">)</text:span></text:p>
        <text:p text:style-name="P66" loext:marker-style-name="T80"><text:span text:style-name="T9"/></text:p>
        <text:p text:style-name="P67" loext:marker-style-name="T80"><text:span text:style-name="T45">BACHELOR</text:span><text:span text:style-name="T46"> </text:span><text:span text:style-name="T45">OF</text:span><text:span text:style-name="T47"> </text:span><text:span text:style-name="T45">ENGINEERING </text:span><text:span text:style-name="T48">IN</text:span></text:p>
        <text:p text:style-name="P68" loext:marker-style-name="T80"><text:span text:style-name="T49">DEPARTMENT</text:span><text:span text:style-name="T50"> </text:span><text:span text:style-name="T49">OF</text:span><text:span text:style-name="T50"> </text:span><text:span text:style-name="T49">CSE(DATA</text:span><text:span text:style-name="T45"> </text:span><text:span text:style-name="T49">SCIENCE)</text:span></text:p>
        <text:p text:style-name="P77" loext:marker-style-name="T80"/>
        <text:p text:style-name="P71" loext:marker-style-name="T83"><text:span text:style-name="T94">Under</text:span><text:span text:style-name="T95"> </text:span><text:span text:style-name="T94">the</text:span><text:span text:style-name="T96"> </text:span><text:span text:style-name="T94">guidance</text:span><text:span text:style-name="T97"> </text:span><text:span text:style-name="T98">of</text:span></text:p>
        <text:p text:style-name="P72" loext:marker-style-name="T99"><text:span text:style-name="T14">Mrs.</text:span><text:span text:style-name="T15"> </text:span><text:span text:style-name="T14">SHAMSIYA</text:span><text:span text:style-name="T15"> </text:span><text:span text:style-name="T16">PARVEEN</text:span></text:p>
        <text:h text:style-name="P8" text:outline-level="2"><text:span text:style-name="T29">Assistant</text:span><text:span text:style-name="T53"> </text:span><text:span text:style-name="T29">Professor,</text:span><text:span text:style-name="T54"> </text:span><text:span text:style-name="T29">Dept.</text:span><text:span text:style-name="T54"> </text:span><text:span text:style-name="T29">of</text:span><text:span text:style-name="T54"> </text:span><text:span text:style-name="T37">CSE(DS),</text:span></text:h>
        <text:p text:style-name="P76" loext:marker-style-name="T2"><draw:frame draw:style-name="fr3" draw:name="Image 4" text:anchor-type="char" svg:x="7.699cm" svg:y="0.672cm" svg:width="4.591cm" svg:height="4.406cm" draw:z-index="49"><draw:image xlink:href="Pictures/100000000000016A0000015B02543462.jpg" xlink:type="simple" xlink:show="embed" xlink:actuate="onLoad" draw:mime-type="image/jpeg"/></draw:frame></text:p>
        <text:p text:style-name="P84" loext:marker-style-name="T3"/>
        <text:p text:style-name="P69" loext:marker-style-name="T100"><text:span text:style-name="T55">SRI</text:span><text:span text:style-name="T56"> </text:span><text:span text:style-name="T55">SIDDHARTHA</text:span><text:span text:style-name="T56"> </text:span><text:span text:style-name="T55">INSTITUTE</text:span><text:span text:style-name="T57"> </text:span><text:span text:style-name="T55">OF </text:span><text:span text:style-name="T58">TECHNOLOGY</text:span></text:p>
      </text:section>
      <text:h text:style-name="P25" text:outline-level="1">TABLE OF CONTENT</text:h>
      <text:list text:style-name="L1">
        <text:list-header>
          <text:p text:style-name="P78"><text:span text:style-name="Strong_20_Emphasis"><text:span text:style-name="T75">1</text:span></text:span><text:span text:style-name="Strong_20_Emphasis"><text:span text:style-name="T72">. Abstract</text:span></text:span></text:p>
          <text:p text:style-name="P79"><text:span text:style-name="Strong_20_Emphasis"><text:span text:style-name="T75">2</text:span></text:span><text:span text:style-name="Strong_20_Emphasis"><text:span text:style-name="T72">. Introduction</text:span></text:span></text:p>
          <text:p text:style-name="P79"><text:span text:style-name="Strong_20_Emphasis"><text:span text:style-name="T75">3</text:span></text:span><text:span text:style-name="Strong_20_Emphasis"><text:span text:style-name="T72">. Dataset Overview</text:span></text:span></text:p>
        </text:list-header>
      </text:list>
      <text:list text:style-name="L2">
        <text:list-item>
          <text:p text:style-name="P80"><text:span text:style-name="Strong_20_Emphasis"><text:span text:style-name="T73">MNIST Dataset</text:span></text:span></text:p>
        </text:list-item>
        <text:list-item>
          <text:p text:style-name="P81"><text:span text:style-name="Strong_20_Emphasis"><text:span text:style-name="T73">EMNIST Digits Dataset</text:span></text:span></text:p>
          <text:p text:style-name="P85"><text:span text:style-name="Strong_20_Emphasis"><text:span text:style-name="T86">4. </text:span></text:span><text:span text:style-name="Strong_20_Emphasis"><text:span text:style-name="T85">Model Architecture</text:span></text:span></text:p>
        </text:list-item>
        <text:list-item>
          <text:p text:style-name="P83">Model 1: MNIST <text:span text:style-name="T105">with Code and Explanation</text:span></text:p>
        </text:list-item>
        <text:list-item>
          <text:p text:style-name="P83">Model 2: EMNIST <text:span text:style-name="T105">with Code and Explanation</text:span></text:p>
          <text:p text:style-name="P86"><text:span text:style-name="T82">5. </text:span><text:span text:style-name="T81">Results &amp; Visualization</text:span></text:p>
          <text:p text:style-name="P86"><text:span text:style-name="T82">6. </text:span><text:span text:style-name="T81">Challenges Faced</text:span></text:p>
          <text:p text:style-name="P86"><text:span text:style-name="T82">7. Conclusion</text:span><text:span text:style-name="T82"/></text:p>
        </text:list-item>
      </text:list>
      <text:list text:style-name="L3">
        <text:list-header>
          <text:p text:style-name="P82"><text:span text:style-name="Strong_20_Emphasis"><text:span text:style-name="T74"/></text:span></text:p>
        </text:list-header>
      </text:list>
      <text:h text:style-name="P3" text:outline-level="1"><text:span text:style-name="T72"/></text:h>
      <text:h text:style-name="P3" text:outline-level="1"><text:span text:style-name="T72"/></text:h>
      <text:h text:style-name="P3" text:outline-level="1"><text:span text:style-name="T72"/></text:h>
      <text:h text:style-name="P3" text:outline-level="1"><text:span text:style-name="T72"/></text:h>
      <text:h text:style-name="P3" text:outline-level="1"><text:span text:style-name="T72"/></text:h>
      <text:h text:style-name="P3" text:outline-level="1"><text:span text:style-name="T72"/></text:h>
      <text:h text:style-name="P3" text:outline-level="1"><text:span text:style-name="T72"/></text:h>
      <text:h text:style-name="P3" text:outline-level="1"><text:span text:style-name="T72"/></text:h>
      <text:h text:style-name="P3" text:outline-level="1"><text:span text:style-name="T72"/></text:h>
      <text:h text:style-name="P42" text:outline-level="1"><text:soft-page-break/><text:span text:style-name="T77">ABSTRACT</text:span><text:span text:style-name="T118">:</text:span></text:h>
      <text:p text:style-name="P10"><text:span text:style-name="T121">This project explores handwritten digit recognition using two deep learning models trained on two different datasets: the well-known </text:span><text:span text:style-name="Strong_20_Emphasis"><text:span text:style-name="T122">MNIST</text:span></text:span><text:span text:style-name="T121"> dataset and the more challenging </text:span><text:span text:style-name="Strong_20_Emphasis"><text:span text:style-name="T122">EMNIST Digits</text:span></text:span><text:span text:style-name="T121"> dataset. The goal was to teach a computer how to recognize digits from 0 to 9 by training it on thousands of handwritten examples.</text:span></text:p>
      <text:p text:style-name="P88">The first model was trained on MNIST, which contains clean and centered digits written by different people. It performed quite well, achieving high accuracy with relatively simple preprocessing and a basic Convolutional Neural Network (CNN). However, MNIST is a bit too "easy"—it doesn't fully represent the messiness of real-world handwriting.</text:p>
      <text:p text:style-name="P88">To take things a step further, the second model was trained on EMNIST Digits, which includes more variation in handwriting and layout. Because of this, it’s harder for the model to learn and sometimes it makes mistakes—for example, it predicted an '8' when the digit was clearly a '7'. While frustrating, these mistakes highlight just how tough it is for machines to interpret human writing, especially when it’s messy or ambiguous.</text:p>
      <text:p text:style-name="P88">Both models share the same architecture: a CNN with layers for feature extraction and classification, trained using TensorFlow/Keras. The input images were normalized and preprocessed (including rotation and flipping for EMNIST) to improve performance. Batching and prefetching were used to speed up training.</text:p>
      <text:p text:style-name="P88">Even though the EMNIST model isn’t fully accurate yet, the project as a whole demonstrates the power and limitations of neural networks when it comes to image recognition. It's a great starting point for deeper work, such as tuning hyperparameters, adding more training tricks, or testing better network architectures. In the end, it’s been a great learning experience in how AI sees and interprets the world—even when it gets things a little wrong.</text:p>
      <text:p text:style-name="P87"/>
      <text:p text:style-name="P87"/>
      <text:p text:style-name="P87"/>
      <text:p text:style-name="P87"/>
      <text:p text:style-name="P87"/>
      <text:h text:style-name="P46" text:outline-level="1"><text:soft-page-break/><text:span text:style-name="T87">INTRODUCTION:</text:span><text:span text:style-name="T78"> </text:span></text:h>
      <text:h text:style-name="P47" text:outline-level="1"><text:span text:style-name="T106">We see numbers written by hand all the time — on paper, whiteboards, receipts, or even scribbled on sticky notes. While humans can usually read them instantly (even if they’re a bit messy), teaching a computer to do the same is surprisingly tricky. This project is all about trying to solve that challenge using deep learning.</text:span></text:h>
      <text:p text:style-name="P89"/>
      <text:p text:style-name="P88">The core idea behind this project is to build a digit recognizer — a machine that can look at an image of a handwritten number (from 0 to 9) and figure out what number it is. To do this, I used Convolutional Neural Networks (CNNs), which are especially good at handling image data. CNNs work by learning patterns — edges, curves, shapes — and slowly building up a “sense” of what a digit looks like.</text:p>
      <text:p text:style-name="P88">To train the model, I used two popular datasets:</text:p>
      <text:list text:style-name="L4">
        <text:list-item>
          <text:p text:style-name="P92"><text:span text:style-name="Strong_20_Emphasis"><text:span text:style-name="T122">MNIST</text:span></text:span><text:span text:style-name="T122">: This is the classic dataset in the field of digit recognition. It’s clean, simple, and contains 60,000 training images and 10,000 test images of digits written by many people. It’s often used to test out new models because it’s relatively easy to work with.</text:span></text:p>
        </text:list-item>
        <text:list-item>
          <text:p text:style-name="P92"><text:span text:style-name="Strong_20_Emphasis"><text:span text:style-name="T122">EMNIST Digits</text:span></text:span><text:span text:style-name="T122">: This dataset is more recent and a bit messier. It has more variation in handwriting and isn't as neatly formatted as MNIST. That makes it harder, but also more realistic if you want your model to work in the real world.</text:span></text:p>
        </text:list-item>
      </text:list>
      <text:p text:style-name="P88"><text:span text:style-name="T104">Our</text:span> goal wasn’t just to train a model that gives perfect results — although that would be nice. It was also to understand how these models learn, what causes them to make mistakes, and how I can improve them. In fact, during testing, the EMNIST-based model made some wrong predictions (like reading a '7' as an '8'), which shows how complex this problem really is.</text:p>
      <text:p text:style-name="P93"><text:span text:style-name="T111">Overall, this project helped me dive into the world of machine learning, gain hands-on experience with datasets and neural networks, and also face the reality that AI isn’t magic — it’s only as good as the data, training, an</text:span>d design behind it.</text:p>
      <text:h text:style-name="P27" text:outline-level="1"><text:span text:style-name="T101"/></text:h>
      <text:h text:style-name="P43" text:outline-level="1"><text:span text:style-name="T102">D</text:span><text:span text:style-name="T103">ATASETS OVERVIEW:</text:span></text:h>
      <text:list text:style-name="WWNum2">
        <text:list-item>
          <text:h text:style-name="P59" text:outline-level="2"><text:span text:style-name="T123">In this project, we worked with two widely used handwritten digit datasets — </text:span><text:span text:style-name="Strong_20_Emphasis"><text:span text:style-name="T123">MNIST</text:span></text:span><text:span text:style-name="T123"> and </text:span><text:span text:style-name="Strong_20_Emphasis"><text:span text:style-name="T123">EMNIST</text:span></text:span><text:span text:style-name="T123">. These datasets played a crucial role in training and evaluating our digit recognition models.</text:span></text:h>
        </text:list-item>
      </text:list>
      <text:p text:style-name="P90"/>
      <text:list text:continue-numbering="true" text:style-name="WWNum2">
        <text:list-item>
          <text:p text:style-name="P60">MNIST Dataset:</text:p>
        </text:list-item>
      </text:list>
      <text:p text:style-name="P4"><text:span text:style-name="T122">The MNIST (Modified National Institute of Standards and Technology) dataset consists of </text:span><text:span text:style-name="Strong_20_Emphasis"><text:span text:style-name="T122">70,000 grayscale images</text:span></text:span><text:span text:style-name="T122"> of handwritten digits ranging from </text:span><text:span text:style-name="Strong_20_Emphasis"><text:span text:style-name="T122">0 to 9</text:span></text:span><text:span text:style-name="T122">. Each image is </text:span><text:span text:style-name="Strong_20_Emphasis"><text:span text:style-name="T122">28×28 pixels</text:span></text:span><text:span text:style-name="T122"> in size, centered, and size-normalized. We used </text:span><text:span text:style-name="Strong_20_Emphasis"><text:span text:style-name="T122">60,000 images for training</text:span></text:span><text:span text:style-name="T122"> and </text:span><text:span text:style-name="Strong_20_Emphasis"><text:span text:style-name="T122">10,000 for testing</text:span></text:span><text:span text:style-name="T122">. MNIST is often considered the "hello world" of computer vision and deep learning due to its simplicity and widespread use.</text:span></text:p>
      <text:p text:style-name="P91"/>
      <text:list text:continue-numbering="true" text:style-name="WWNum2">
        <text:list-item>
          <text:p text:style-name="P61">EMNIST Dataset:</text:p>
        </text:list-item>
      </text:list>
      <text:p text:style-name="P5"><text:span text:style-name="T122">To take things a step further, we also trained a second model using the </text:span><text:span text:style-name="Strong_20_Emphasis"><text:span text:style-name="T122">EMNIST (Extended MNIST)</text:span></text:span><text:span text:style-name="T122"> dataset, specifically the </text:span><text:span text:style-name="Strong_20_Emphasis"><text:span text:style-name="T122">'digits' split</text:span></text:span><text:span text:style-name="T122">, which also includes </text:span><text:span text:style-name="Strong_20_Emphasis"><text:span text:style-name="T122">handwritten digits 0–9</text:span></text:span><text:span text:style-name="T122">, but from a different data source. EMNIST images are also </text:span><text:span text:style-name="Strong_20_Emphasis"><text:span text:style-name="T122">28×28 pixels</text:span></text:span><text:span text:style-name="T122">, but they often come </text:span><text:span text:style-name="Strong_20_Emphasis"><text:span text:style-name="T122">rotated and mirrored</text:span></text:span><text:span text:style-name="T122">, requiring additional preprocessing to correct their orientation. This dataset adds diversity and complexity, helping us test the generalization power of our digit recognition pipeline.</text:span></text:p>
      <text:p text:style-name="P88">By using both datasets, we were able to compare how our models performed under different conditions, and to identify areas where accuracy still needs improvement.</text:p>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1"><text:soft-page-break/><text:span text:style-name="T72">M</text:span><text:span text:style-name="T76">ODEL ARCHITECTURE:</text:span></text:h>
      <text:h text:style-name="P1" text:outline-level="1"><text:span text:style-name="T76"/></text:h>
      <text:h text:style-name="P32" text:outline-level="1">We built two Convolutional Neural Network (CNN) models for digit classification — one trained on the MNIST dataset and the other on the EMNIST (Digits subset) dataset. Both models share a similar base structure but were trained independently due to the differences in dataset orientation and structure.</text:h>
      <text:h text:style-name="P55" text:outline-level="1"><text:span text:style-name="T19"/></text:h>
      <text:list text:style-name="L5">
        <text:list-item>
          <text:h text:style-name="P28" text:outline-level="1">Model 1: MNIST:</text:h>
        </text:list-item>
      </text:list>
      <text:h text:style-name="P57" text:outline-level="1"><text:span text:style-name="T19"/></text:h>
      <text:list text:style-name="L6">
        <text:list-item>
          <text:h text:style-name="P38" text:outline-level="1"><text:span text:style-name="Strong_20_Emphasis"><text:span text:style-name="T27">Input Layer:</text:span></text:span><text:span text:style-name="T27"> </text:span><text:span text:style-name="T28">28×28 grayscale image</text:span></text:h>
        </text:list-item>
        <text:list-item>
          <text:h text:style-name="P38" text:outline-level="1"><text:span text:style-name="Strong_20_Emphasis"><text:span text:style-name="T27">Conv2D:</text:span></text:span><text:span text:style-name="T28"> 32 filters, 3×3 kernel, ReLU activation</text:span></text:h>
        </text:list-item>
        <text:list-item>
          <text:h text:style-name="P38" text:outline-level="1"><text:span text:style-name="Strong_20_Emphasis"><text:span text:style-name="T27">MaxPooling2D:</text:span></text:span><text:span text:style-name="T28"> 2×2 pool size</text:span></text:h>
        </text:list-item>
        <text:list-item>
          <text:h text:style-name="P38" text:outline-level="1"><text:span text:style-name="Strong_20_Emphasis"><text:span text:style-name="T27">Conv2D:</text:span></text:span><text:span text:style-name="T28"> 64 filters, 3×3 kernel, ReLU activation</text:span></text:h>
        </text:list-item>
        <text:list-item>
          <text:h text:style-name="P38" text:outline-level="1"><text:span text:style-name="Strong_20_Emphasis"><text:span text:style-name="T27">MaxPooling2D:</text:span></text:span><text:span text:style-name="T28"> 2×2 pool size</text:span></text:h>
        </text:list-item>
        <text:list-item>
          <text:h text:style-name="P36" text:outline-level="1">Flatten Layer</text:h>
        </text:list-item>
        <text:list-item>
          <text:h text:style-name="P38" text:outline-level="1"><text:span text:style-name="Strong_20_Emphasis"><text:span text:style-name="T27">Dense:</text:span></text:span><text:span text:style-name="T27"> </text:span><text:span text:style-name="T28">128 neurons, ReLU activation</text:span></text:h>
        </text:list-item>
        <text:list-item>
          <text:h text:style-name="P39" text:outline-level="1"><text:span text:style-name="Strong_20_Emphasis"><text:span text:style-name="T27">Output Dense Layer:</text:span></text:span><text:span text:style-name="T28"> 10 neurons (digits 0–9), Softmax activation</text:span></text:h>
        </text:list-item>
      </text:list>
      <text:h text:style-name="P2" text:outline-level="1"><text:span text:style-name="T21"/></text:h>
      <text:h text:style-name="P29" text:outline-level="1">CODE AND EXPLANATION:</text:h>
      <text:h text:style-name="P7" text:outline-level="1"><text:span text:style-name="T19"/></text:h>
      <text:h text:style-name="P33" text:outline-level="1"># Cell 1: imports</text:h>
      <text:h text:style-name="P34" text:outline-level="1">import os <text:s text:c="29"/></text:h>
      <text:h text:style-name="P34" text:outline-level="1"># Provides functions for interacting with the OS</text:h>
      <text:h text:style-name="P34" text:outline-level="1">import numpy as np <text:s text:c="20"/></text:h>
      <text:h text:style-name="P34" text:outline-level="1"># Used for numerical computations and arrays</text:h>
      <text:h text:style-name="P34" text:outline-level="1">import matplotlib.pyplot as plt <text:s text:c="7"/></text:h>
      <text:h text:style-name="P34" text:outline-level="1"># For plotting and visualization</text:h>
      <text:h text:style-name="P34" text:outline-level="1">import tensorflow as tf <text:s text:c="15"/></text:h>
      <text:h text:style-name="P34" text:outline-level="1"># TensorFlow library for deep learning</text:h>
      <text:h text:style-name="P34" text:outline-level="1">from tensorflow import keras <text:s text:c="10"/></text:h>
      <text:h text:style-name="P34" text:outline-level="1"># High-level API for building and training models</text:h>
      <text:h text:style-name="P34" text:outline-level="1">import cv2 <text:s text:c="28"/></text:h>
      <text:h text:style-name="P34" text:outline-level="1"># OpenCV for image processing</text:h>
      <text:h text:style-name="P56" text:outline-level="1"><text:span text:style-name="T19"/></text:h>
      <text:h text:style-name="P33" text:outline-level="1"># Set seeds for reproducibility</text:h>
      <text:h text:style-name="P33" text:outline-level="1">np.random.seed(42) <text:s text:c="20"/># Set NumPy random seed</text:h>
      <text:h text:style-name="P33" text:outline-level="1">tf.random.set_seed(42) <text:s text:c="16"/># Set TensorFlow random seed</text:h>
      <text:h text:style-name="P56" text:outline-level="1"><text:span text:style-name="T19"/></text:h>
      <text:h text:style-name="P33" text:outline-level="1"># Cell 2: load MNIST from Keras</text:h>
      <text:h text:style-name="P33" text:outline-level="1"><text:soft-page-break/>(x_train, y_train), (x_test, y_test) = keras.datasets.mnist.load_data() <text:s/># Load MNIST dataset</text:h>
      <text:h text:style-name="P56" text:outline-level="1"><text:span text:style-name="T19"/></text:h>
      <text:h text:style-name="P33" text:outline-level="1"># Normalize to [0,1] and add channel dimension</text:h>
      <text:h text:style-name="P34" text:outline-level="1">x_train = x_train.astype('float32') / 255.0 <text:s text:c="7"/></text:h>
      <text:h text:style-name="P34" text:outline-level="1"># Normalize training images</text:h>
      <text:h text:style-name="P34" text:outline-level="1">x_test <text:s/>= x_test.astype('float32') <text:s/>/ 255.0 <text:s text:c="7"/></text:h>
      <text:h text:style-name="P34" text:outline-level="1"># Normalize test images</text:h>
      <text:h text:style-name="P34" text:outline-level="1">x_train = np.expand_dims(x_train, -1) <text:s text:c="13"/></text:h>
      <text:h text:style-name="P34" text:outline-level="1"># Add channel dim: (60000, 28, 28, 1)</text:h>
      <text:h text:style-name="P34" text:outline-level="1">x_test <text:s/>= np.expand_dims(x_test, -1) <text:s text:c="14"/></text:h>
      <text:h text:style-name="P34" text:outline-level="1"># Add channel dim: (10000, 28, 28, 1)</text:h>
      <text:h text:style-name="P56" text:outline-level="1"><text:span text:style-name="T19"/></text:h>
      <text:h text:style-name="P33" text:outline-level="1"># Cell 3: model definition</text:h>
      <text:h text:style-name="P34" text:outline-level="1">model = keras.models.Sequential([ <text:s text:c="17"/></text:h>
      <text:h text:style-name="P34" text:outline-level="1"># Initialize a Sequential model</text:h>
      <text:h text:style-name="P33" text:outline-level="1"><text:s text:c="4"/>keras.layers.Conv2D(32, 3, activation='relu', input_shape=(28,28,1)), <text:s/># Conv layer with 32 filters</text:h>
      <text:h text:style-name="P34" text:outline-level="1"><text:s text:c="4"/>keras.layers.MaxPool2D(), <text:s text:c="21"/></text:h>
      <text:h text:style-name="P34" text:outline-level="1"># Max pooling to reduce spatial size</text:h>
      <text:h text:style-name="P34" text:outline-level="1"><text:s text:c="4"/>keras.layers.Conv2D(64, 3, activation='relu'), </text:h>
      <text:h text:style-name="P34" text:outline-level="1"># Another conv layer with 64 filters</text:h>
      <text:h text:style-name="P34" text:outline-level="1"><text:s text:c="4"/>keras.layers.MaxPool2D(), <text:s text:c="21"/></text:h>
      <text:h text:style-name="P34" text:outline-level="1"># Another max pooling layer</text:h>
      <text:h text:style-name="P34" text:outline-level="1"><text:s text:c="4"/>keras.layers.Flatten(), <text:s text:c="23"/></text:h>
      <text:h text:style-name="P34" text:outline-level="1"># Flatten output to 1D vector</text:h>
      <text:h text:style-name="P34" text:outline-level="1"><text:s text:c="4"/>keras.layers.Dense(128, activation='relu'), <text:s text:c="3"/></text:h>
      <text:h text:style-name="P34" text:outline-level="1"># Dense layer with 128 neurons</text:h>
      <text:h text:style-name="P34" text:outline-level="1"><text:s text:c="4"/>keras.layers.Dense(10, activation='softmax') <text:s text:c="2"/></text:h>
      <text:h text:style-name="P34" text:outline-level="1"># Output layer with 10 classes (digits)</text:h>
      <text:h text:style-name="P33" text:outline-level="1">])</text:h>
      <text:h text:style-name="P56" text:outline-level="1"><text:span text:style-name="T19"/></text:h>
      <text:h text:style-name="P33" text:outline-level="1">model.compile(</text:h>
      <text:h text:style-name="P34" text:outline-level="1"><text:s text:c="4"/>loss='sparse_categorical_crossentropy', <text:s text:c="7"/></text:h>
      <text:h text:style-name="P34" text:outline-level="1"># Loss function for integer labels</text:h>
      <text:h text:style-name="P33" text:outline-level="1"><text:s text:c="4"/>optimizer='adam', <text:s text:c="29"/># Adam optimizer</text:h>
      <text:h text:style-name="P33" text:outline-level="1"><text:s text:c="4"/>metrics=['accuracy'] <text:s text:c="26"/># Track accuracy metric</text:h>
      <text:h text:style-name="P33" text:outline-level="1">)</text:h>
      <text:h text:style-name="P33" text:outline-level="1">model.summary() <text:s text:c="35"/># Print model architecture</text:h>
      <text:h text:style-name="P56" text:outline-level="1"><text:soft-page-break/><text:span text:style-name="T19"/></text:h>
      <text:h text:style-name="P33" text:outline-level="1"># Cell 4: training</text:h>
      <text:h text:style-name="P33" text:outline-level="1">history = model.fit(</text:h>
      <text:h text:style-name="P33" text:outline-level="1"><text:s text:c="4"/>x_train, y_train, <text:s text:c="15"/># Training data</text:h>
      <text:h text:style-name="P33" text:outline-level="1"><text:s text:c="4"/>epochs=3, <text:s text:c="23"/># Train for 3 epochs</text:h>
      <text:h text:style-name="P33" text:outline-level="1"><text:s text:c="4"/>batch_size=128, <text:s text:c="16"/># Process 128 samples at a time</text:h>
      <text:h text:style-name="P33" text:outline-level="1"><text:s text:c="4"/>validation_split=0.1 <text:s text:c="11"/># Use 10% of data for validation</text:h>
      <text:h text:style-name="P33" text:outline-level="1">)</text:h>
      <text:h text:style-name="P56" text:outline-level="1"><text:span text:style-name="T19"/></text:h>
      <text:h text:style-name="P33" text:outline-level="1"># Cell 5: save the model</text:h>
      <text:h text:style-name="P34" text:outline-level="1">model.save('../model/digit_recognizer.h5') <text:s text:c="7"/></text:h>
      <text:h text:style-name="P34" text:outline-level="1"># Save trained model to disk</text:h>
      <text:h text:style-name="P56" text:outline-level="1"><text:span text:style-name="T19"/></text:h>
      <text:h text:style-name="P33" text:outline-level="1"># Cell 6</text:h>
      <text:h text:style-name="P34" text:outline-level="1">model = keras.models.load_model('../model/digit_recognizer.h5') <text:s/></text:h>
      <text:h text:style-name="P34" text:outline-level="1"># Load the saved model</text:h>
      <text:h text:style-name="P56" text:outline-level="1"><text:span text:style-name="T19"/></text:h>
      <text:h text:style-name="P33" text:outline-level="1"># Cell 7</text:h>
      <text:h text:style-name="P34" text:outline-level="1">img_path = '../captured_images/digit9.jpeg' <text:s text:c="7"/></text:h>
      <text:h text:style-name="P34" text:outline-level="1"># Path to custom digit image</text:h>
      <text:h text:style-name="P34" text:outline-level="1">img = cv2.imread(img_path, cv2.IMREAD_GRAYSCALE) <text:s text:c="2"/></text:h>
      <text:h text:style-name="P34" text:outline-level="1"># Load image in grayscale</text:h>
      <text:h text:style-name="P34" text:outline-level="1">img = cv2.resize(img, (28,28)) <text:s text:c="19"/></text:h>
      <text:h text:style-name="P34" text:outline-level="1"><text:s/># Resize image to 28x28 pixels</text:h>
      <text:h text:style-name="P34" text:outline-level="1">img = 255 - img <text:s text:c="35"/></text:h>
      <text:h text:style-name="P34" text:outline-level="1"># Invert colors: white digit on black bg</text:h>
      <text:h text:style-name="P34" text:outline-level="1">img = img.astype('float32')/255 <text:s text:c="19"/></text:h>
      <text:h text:style-name="P34" text:outline-level="1"># Normalize pixel values to [0,1]</text:h>
      <text:h text:style-name="P34" text:outline-level="1">img = np.expand_dims(img, (0,-1)) <text:s text:c="17"/></text:h>
      <text:h text:style-name="P34" text:outline-level="1"># Reshape to (1,28,28,1) for prediction</text:h>
      <text:h text:style-name="P56" text:outline-level="1"><text:span text:style-name="T19"/></text:h>
      <text:h text:style-name="P34" text:outline-level="1">pred = model.predict(img) <text:s text:c="25"/></text:h>
      <text:h text:style-name="P34" text:outline-level="1"># Predict digit class probabilities</text:h>
      <text:h text:style-name="P34" text:outline-level="1">digit = np.argmax(pred) <text:s text:c="27"/></text:h>
      <text:h text:style-name="P34" text:outline-level="1"># Get digit with highest probability</text:h>
      <text:h text:style-name="P34" text:outline-level="1">print("Predicted digit:", digit) <text:s text:c="18"/></text:h>
      <text:h text:style-name="P34" text:outline-level="1"># Print predicted digit</text:h>
      <text:h text:style-name="P56" text:outline-level="1"><text:span text:style-name="T19"/></text:h>
      <text:h text:style-name="P33" text:outline-level="1"># Display</text:h>
      <text:h text:style-name="P33" text:outline-level="1"><text:soft-page-break/>plt.imshow(img.squeeze(), cmap='gray') <text:s text:c="12"/># Show the image</text:h>
      <text:h text:style-name="P33" text:outline-level="1">plt.title(f"Prediction: {digit}") <text:s text:c="17"/># Add prediction as title</text:h>
      <text:h text:style-name="P34" text:outline-level="1">plt.axis('off'); <text:s text:c="34"/># Turn off axis display</text:h>
      <text:h text:style-name="P18" text:outline-level="1"><text:span text:style-name="T22"/></text:h>
      <text:h text:style-name="P18" text:outline-level="1"><text:span text:style-name="T22"/></text:h>
      <text:list text:style-name="L7">
        <text:list-item>
          <text:h text:style-name="P40" text:outline-level="1"><text:span text:style-name="T22"><text:s text:c="4"/></text:span><text:span text:style-name="T24">Model 2: EMNIST (Digits):</text:span></text:h>
        </text:list-item>
      </text:list>
      <text:h text:style-name="P58" text:outline-level="1"><text:span text:style-name="T19"/></text:h>
      <text:list text:style-name="L8">
        <text:list-item>
          <text:h text:style-name="P41" text:outline-level="1"><text:span text:style-name="Strong_20_Emphasis"><text:span text:style-name="T27">Input Layer:</text:span></text:span><text:span text:style-name="T27"> </text:span><text:span text:style-name="T28">28×28 grayscale image (after rotation + mirroring)</text:span></text:h>
        </text:list-item>
        <text:list-item>
          <text:h text:style-name="P41" text:outline-level="1"><text:span text:style-name="Strong_20_Emphasis"><text:span text:style-name="T27">Conv2D:</text:span></text:span><text:span text:style-name="T28"> 32 filters, 3×3 kernel, ReLU activation</text:span></text:h>
        </text:list-item>
        <text:list-item>
          <text:h text:style-name="P41" text:outline-level="1"><text:span text:style-name="Strong_20_Emphasis"><text:span text:style-name="T27">MaxPooling2D:</text:span></text:span><text:span text:style-name="T28"> 2×2 pool size</text:span></text:h>
        </text:list-item>
        <text:list-item>
          <text:h text:style-name="P41" text:outline-level="1"><text:span text:style-name="Strong_20_Emphasis"><text:span text:style-name="T27">Conv2D:</text:span></text:span><text:span text:style-name="T28"> 64 filters, 3×3 kernel, ReLU activation</text:span></text:h>
        </text:list-item>
        <text:list-item>
          <text:h text:style-name="P41" text:outline-level="1"><text:span text:style-name="Strong_20_Emphasis"><text:span text:style-name="T27">MaxPooling2D:</text:span></text:span><text:span text:style-name="T28"> 2×2 pool size</text:span></text:h>
        </text:list-item>
        <text:list-item>
          <text:h text:style-name="P37" text:outline-level="1">Flatten Layer</text:h>
        </text:list-item>
        <text:list-item>
          <text:h text:style-name="P41" text:outline-level="1"><text:span text:style-name="Strong_20_Emphasis"><text:span text:style-name="T27">Dense:</text:span></text:span><text:span text:style-name="T27"> </text:span><text:span text:style-name="T28">128 neurons, ReLU activation</text:span></text:h>
        </text:list-item>
        <text:list-item>
          <text:h text:style-name="P41" text:outline-level="1"><text:span text:style-name="Strong_20_Emphasis"><text:span text:style-name="T27">Output Dense Layer:</text:span></text:span><text:span text:style-name="T28"> 10 neurons (digits 0–9), Softmax activation</text:span></text:h>
        </text:list-item>
      </text:list>
      <text:h text:style-name="P58" text:outline-level="1"><text:span text:style-name="T20"/></text:h>
      <text:h text:style-name="P33" text:outline-level="1">Though the architecture is the same, the EMNIST model required extra preprocessing to correct orientation issues inherent in the dataset.</text:h>
      <text:h text:style-name="P6" text:outline-level="1"><text:span text:style-name="T20"/></text:h>
      <text:h text:style-name="P30" text:outline-level="1">CODE AND EXPLANATION:</text:h>
      <text:h text:style-name="P13" text:outline-level="1"><text:span text:style-name="T19"/></text:h>
      <text:h text:style-name="P35" text:outline-level="1"># Cell 1: Imports and Setup</text:h>
      <text:h text:style-name="P35" text:outline-level="1">import numpy as np <text:s text:c="28"/></text:h>
      <text:h text:style-name="P35" text:outline-level="1"># NumPy for numerical operations</text:h>
      <text:h text:style-name="P35" text:outline-level="1">import matplotlib.pyplot as plt <text:s text:c="15"/></text:h>
      <text:h text:style-name="P35" text:outline-level="1"># For plotting images and results</text:h>
      <text:h text:style-name="P35" text:outline-level="1">import tensorflow as tf <text:s text:c="23"/></text:h>
      <text:h text:style-name="P35" text:outline-level="1"># TensorFlow for deep learning</text:h>
      <text:h text:style-name="P35" text:outline-level="1">from tensorflow import keras <text:s text:c="18"/></text:h>
      <text:h text:style-name="P35" text:outline-level="1"># Keras API for building models</text:h>
      <text:h text:style-name="P35" text:outline-level="1">import tensorflow_datasets as tfds <text:s text:c="12"/></text:h>
      <text:h text:style-name="P35" text:outline-level="1"># To load datasets like EMNIST</text:h>
      <text:h text:style-name="P35" text:outline-level="1">import cv2 <text:s text:c="36"/># OpenCV for image processing</text:h>
      <text:h text:style-name="P35" text:outline-level="1"/>
      <text:h text:style-name="P35" text:outline-level="1"># Set random seeds for reproducibility</text:h>
      <text:h text:style-name="P35" text:outline-level="1">np.random.seed(42) <text:s text:c="28"/># Set seed for NumPy</text:h>
      <text:h text:style-name="P35" text:outline-level="1">tf.random.set_seed(42) <text:s text:c="24"/># Set seed for TensorFlow</text:h>
      <text:h text:style-name="P35" text:outline-level="1"/>
      <text:h text:style-name="P35" text:outline-level="1"># Cell 2: Load EMNIST (digits only)</text:h>
      <text:h text:style-name="P35" text:outline-level="1"><text:soft-page-break/>(ds_train, ds_test), ds_info = tfds.load( <text:s text:c="5"/></text:h>
      <text:h text:style-name="P35" text:outline-level="1"># Load EMNIST digits dataset</text:h>
      <text:h text:style-name="P35" text:outline-level="1"><text:s text:c="4"/>'emnist/digits', <text:s text:c="26"/># Dataset name</text:h>
      <text:h text:style-name="P35" text:outline-level="1"><text:s text:c="4"/>split=['train', 'test'], <text:s text:c="18"/># Split into training and test sets</text:h>
      <text:h text:style-name="P35" text:outline-level="1"><text:s text:c="4"/>shuffle_files=True, <text:s text:c="23"/># Shuffle files for better training</text:h>
      <text:h text:style-name="P35" text:outline-level="1"><text:s text:c="4"/>as_supervised=True, <text:s text:c="23"/># Return (image, label) pairs</text:h>
      <text:h text:style-name="P35" text:outline-level="1"><text:s text:c="4"/>with_info=True <text:s text:c="28"/># Also return dataset metadata</text:h>
      <text:h text:style-name="P35" text:outline-level="1">)</text:h>
      <text:h text:style-name="P35" text:outline-level="1"/>
      <text:h text:style-name="P35" text:outline-level="1"># Preprocessing function</text:h>
      <text:h text:style-name="P35" text:outline-level="1">def preprocess(image, label):</text:h>
      <text:h text:style-name="P35" text:outline-level="1"><text:s text:c="4"/>image = tf.cast(image, tf.float32) / 255.0 <text:s text:c="6"/></text:h>
      <text:h text:style-name="P35" text:outline-level="1"># Normalize image to [0, 1]</text:h>
      <text:h text:style-name="P35" text:outline-level="1"><text:s text:c="4"/>image = tf.image.rot90(image, k=1) <text:s text:c="14"/></text:h>
      <text:h text:style-name="P35" text:outline-level="1"># Rotate 90° to fix orientation</text:h>
      <text:h text:style-name="P35" text:outline-level="1"><text:s text:c="4"/>image = tf.image.flip_left_right(image) <text:s text:c="9"/></text:h>
      <text:h text:style-name="P35" text:outline-level="1"># Flip to correct mirror image</text:h>
      <text:h text:style-name="P35" text:outline-level="1"><text:s text:c="4"/>return image, label <text:s text:c="29"/></text:h>
      <text:h text:style-name="P35" text:outline-level="1"># Return processed image and label</text:h>
      <text:h text:style-name="P35" text:outline-level="1"/>
      <text:h text:style-name="P35" text:outline-level="1"># Apply preprocessing</text:h>
      <text:h text:style-name="P35" text:outline-level="1">ds_train = ds_train.map(preprocess).batch(128).prefetch(tf.data.AUTOTUNE) <text:s/># Preprocess, batch, and prefetch training data</text:h>
      <text:h text:style-name="P35" text:outline-level="1">ds_test <text:s/>= ds_test.map(preprocess).batch(128).prefetch(tf.data.AUTOTUNE) <text:s text:c="2"/># Preprocess, batch, and prefetch test data</text:h>
      <text:h text:style-name="P35" text:outline-level="1"/>
      <text:h text:style-name="P35" text:outline-level="1"># Cell 3: Define the model</text:h>
      <text:h text:style-name="P35" text:outline-level="1">model = keras.models.Sequential([ <text:s text:c="18"/></text:h>
      <text:h text:style-name="P35" text:outline-level="1"># Initialize a sequential model</text:h>
      <text:h text:style-name="P35" text:outline-level="1"><text:s text:c="4"/>keras.layers.Conv2D(32, 3, activation='relu', input_shape=(28,28,1)), <text:s/># Conv layer with 32 filters</text:h>
      <text:h text:style-name="P35" text:outline-level="1"><text:s text:c="4"/>keras.layers.MaxPool2D(), <text:s text:c="15"/># Max pooling to reduce size</text:h>
      <text:h text:style-name="P35" text:outline-level="1"><text:s text:c="4"/>keras.layers.Conv2D(64, 3, activation='relu'), <text:s/></text:h>
      <text:h text:style-name="P35" text:outline-level="1"># Another conv layer with 64 filters</text:h>
      <text:h text:style-name="P35" text:outline-level="1"><text:s text:c="4"/>keras.layers.MaxPool2D(), <text:s text:c="13"/># Another max pooling layer</text:h>
      <text:h text:style-name="P35" text:outline-level="1"><text:s text:c="4"/>keras.layers.Flatten(), <text:s text:c="24"/># Flatten feature maps to 1D</text:h>
      <text:h text:style-name="P35" text:outline-level="1"><text:s text:c="4"/>keras.layers.Dense(128, activation='relu'), <text:s text:c="4"/></text:h>
      <text:h text:style-name="P35" text:outline-level="1"># Dense layer with 128 neurons</text:h>
      <text:h text:style-name="P35" text:outline-level="1"><text:s text:c="4"/>keras.layers.Dense(10, activation='softmax') <text:s text:c="3"/></text:h>
      <text:h text:style-name="P35" text:outline-level="1"><text:soft-page-break/># Output layer for 10 digit classes</text:h>
      <text:h text:style-name="P35" text:outline-level="1">])</text:h>
      <text:h text:style-name="P35" text:outline-level="1"/>
      <text:h text:style-name="P35" text:outline-level="1">model.compile(</text:h>
      <text:h text:style-name="P35" text:outline-level="1"><text:s text:c="4"/>optimizer='adam', <text:s text:c="25"/># Use Adam optimizer</text:h>
      <text:h text:style-name="P35" text:outline-level="1"><text:s text:c="4"/>loss='sparse_categorical_crossentropy', <text:s text:c="4"/># Loss function for integer labels</text:h>
      <text:h text:style-name="P35" text:outline-level="1"><text:s text:c="4"/>metrics=['accuracy'] <text:s text:c="27"/># Track accuracy during training</text:h>
      <text:h text:style-name="P35" text:outline-level="1">)</text:h>
      <text:h text:style-name="P35" text:outline-level="1"/>
      <text:h text:style-name="P35" text:outline-level="1">model.summary() <text:s text:c="36"/># Print model summary</text:h>
      <text:h text:style-name="P35" text:outline-level="1"/>
      <text:h text:style-name="P35" text:outline-level="1"># Cell 4: Train the model</text:h>
      <text:h text:style-name="P35" text:outline-level="1">history = model.fit(</text:h>
      <text:h text:style-name="P35" text:outline-level="1"><text:s text:c="4"/>ds_train, <text:s text:c="38"/># Training dataset</text:h>
      <text:h text:style-name="P35" text:outline-level="1"><text:s text:c="4"/>validation_data=ds_test, <text:s text:c="23"/># Validation on test dataset</text:h>
      <text:h text:style-name="P35" text:outline-level="1"><text:s text:c="4"/>epochs=5 <text:s text:c="39"/># Train for 5 epochs</text:h>
      <text:h text:style-name="P35" text:outline-level="1">)</text:h>
      <text:h text:style-name="P35" text:outline-level="1"/>
      <text:h text:style-name="P35" text:outline-level="1"># Cell 5: Save the model</text:h>
      <text:h text:style-name="P35" text:outline-level="1">model.save('digit_emnist_model.h5') <text:s text:c="15"/></text:h>
      <text:h text:style-name="P35" text:outline-level="1"># Save the trained model to disk</text:h>
      <text:h text:style-name="P35" text:outline-level="1"/>
      <text:h text:style-name="P35" text:outline-level="1"># Cell 6: Load and test prediction on a captured image</text:h>
      <text:h text:style-name="P35" text:outline-level="1">model = keras.models.load_model('digit_emnist_model.h5') <text:s/># Load the saved model</text:h>
      <text:h text:style-name="P35" text:outline-level="1"/>
      <text:h text:style-name="P35" text:outline-level="1">img_path = '../captured_images/digit1.jpg' <text:s text:c="8"/></text:h>
      <text:h text:style-name="P35" text:outline-level="1"># Path to captured digit image</text:h>
      <text:h text:style-name="P35" text:outline-level="1">img = cv2.imread(img_path, cv2.IMREAD_GRAYSCALE) <text:s text:c="2"/></text:h>
      <text:h text:style-name="P35" text:outline-level="1"># Load image in grayscale</text:h>
      <text:h text:style-name="P35" text:outline-level="1">img = cv2.resize(img, (28,28)) <text:s text:c="20"/></text:h>
      <text:h text:style-name="P35" text:outline-level="1"># Resize image to 28x28</text:h>
      <text:h text:style-name="P35" text:outline-level="1">img = 255 - img <text:s text:c="36"/></text:h>
      <text:h text:style-name="P35" text:outline-level="1"># Invert image: white digit on black</text:h>
      <text:h text:style-name="P35" text:outline-level="1">img = img.astype('float32') / 255.0 <text:s text:c="11"/># Normalize pixel values</text:h>
      <text:h text:style-name="P35" text:outline-level="1">img = np.expand_dims(img, axis=(0, -1)) <text:s text:c="11"/></text:h>
      <text:h text:style-name="P35" text:outline-level="1"># Reshape to (1,28,28,1) for model input</text:h>
      <text:h text:style-name="P35" text:outline-level="1"/>
      <text:h text:style-name="P35" text:outline-level="1"># Predict</text:h>
      <text:h text:style-name="P35" text:outline-level="1"><text:soft-page-break/>pred = model.predict(img) <text:s text:c="17"/># Run prediction</text:h>
      <text:h text:style-name="P35" text:outline-level="1">digit = np.argmax(pred) <text:s text:c="24"/></text:h>
      <text:h text:style-name="P35" text:outline-level="1"># Get digit with highest probability</text:h>
      <text:h text:style-name="P35" text:outline-level="1">print("Predicted Digit:", digit) <text:s text:c="18"/># Print predicted digit</text:h>
      <text:h text:style-name="P35" text:outline-level="1"/>
      <text:h text:style-name="P35" text:outline-level="1"># Display</text:h>
      <text:h text:style-name="P35" text:outline-level="1">plt.imshow(img.squeeze(), cmap='gray') <text:s text:c="6"/># Show the digit image</text:h>
      <text:h text:style-name="P35" text:outline-level="1">plt.title(f"Prediction: {digit}") <text:s text:c="13"/># Add prediction in title</text:h>
      <text:h text:style-name="P35" text:outline-level="1">plt.axis('off') <text:s text:c="32"/># Hide axes</text:h>
      <text:h text:style-name="P35" text:outline-level="1">plt.show() <text:s text:c="31"/># Display the plot</text:h>
      <text:h text:style-name="P13" text:outline-level="1"/>
      <text:h text:style-name="P30" text:outline-level="1"><text:span text:style-name="T108">RESULTS AND VISUALIZATION</text:span>:</text:h>
      <text:h text:style-name="P15" text:outline-level="1">For zero(0): <text:span text:style-name="T106">The output:</text:span></text:h>
      <text:h text:style-name="P15" text:outline-level="1"><draw:frame draw:style-name="fr2" draw:name="Image2" text:anchor-type="char" svg:x="0.631cm" svg:y="0cm" svg:width="9.587cm" svg:height="10.456cm" draw:z-index="50"><draw:image xlink:href="Pictures/10000001000002CC0000030D3A207EF9.png" xlink:type="simple" xlink:show="embed" xlink:actuate="onLoad" draw:mime-type="image/png"/></draw:frame></text:h>
      <text:h text:style-name="P26" text:outline-level="1"><text:span text:style-name="T25">For one(1): </text:span><text:span text:style-name="T26">The output</text:span></text:h>
      <text:h text:style-name="P11" text:outline-level="1"><draw:frame draw:style-name="fr2" draw:name="Image6" text:anchor-type="char" svg:x="0.644cm" svg:y="0.215cm" svg:width="8.955cm" svg:height="9.767cm" draw:z-index="51"><draw:image xlink:href="Pictures/10000001000002CC0000030D2E67A2C2.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6" text:outline-level="1"/>
      <text:h text:style-name="P16" text:outline-level="1"/>
      <text:h text:style-name="P16" text:outline-level="1"/>
      <text:h text:style-name="P16" text:outline-level="1">For <text:span text:style-name="T109">two</text:span>(<text:span text:style-name="T109">2</text:span>): <text:span text:style-name="T107">The output</text:span></text:h>
      <text:h text:style-name="P16" text:outline-level="1"><draw:frame draw:style-name="fr2" draw:name="Image1" text:anchor-type="char" svg:x="0.418cm" svg:y="0.422cm" svg:width="10.661cm" svg:height="11.225cm" draw:z-index="52"><draw:image xlink:href="Pictures/10000001000002CD000002F386440AC8.png" xlink:type="simple" xlink:show="embed" xlink:actuate="onLoad" draw:mime-type="image/png"/></draw:frame></text:h>
      <text:h text:style-name="P16"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text:soft-page-break/>For <text:span text:style-name="T109">three</text:span>(<text:span text:style-name="T109">3</text:span>): <text:span text:style-name="T107">The output</text:span></text:h>
      <text:h text:style-name="P11" text:outline-level="1"><draw:frame draw:style-name="fr2" draw:name="Image5" text:anchor-type="char" svg:x="0.312cm" svg:y="0cm" svg:width="10.301cm" svg:height="10.846cm" draw:z-index="53"><draw:image xlink:href="Pictures/10000001000002CD000002F34C33C315.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6" text:outline-level="1">For <text:span text:style-name="T109">four</text:span>(<text:span text:style-name="T109">4</text:span>): <text:span text:style-name="T107">The output</text:span></text:h>
      <text:h text:style-name="P11" text:outline-level="1"><draw:frame draw:style-name="fr2" draw:name="Image7" text:anchor-type="char" svg:x="0.58cm" svg:y="0cm" svg:width="10.448cm" svg:height="9.675cm" draw:z-index="54"><draw:image xlink:href="Pictures/10000001000002CD00000298210A57DA.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6" text:outline-level="1"><text:soft-page-break/>For <text:span text:style-name="T109">five</text:span>(<text:span text:style-name="T109">5</text:span>): <text:span text:style-name="T107">The output</text:span></text:h>
      <text:h text:style-name="P11" text:outline-level="1"><draw:frame draw:style-name="fr2" draw:name="Image8" text:anchor-type="char" svg:x="0.434cm" svg:y="0cm" svg:width="9.786cm" svg:height="10.806cm" draw:z-index="55"><draw:image xlink:href="Pictures/10000001000002BD00000306BBFBFCF8.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6" text:outline-level="1">For <text:span text:style-name="T109">six(6</text:span>): <text:span text:style-name="T107">The output</text:span></text:h>
      <text:h text:style-name="P11" text:outline-level="1"><draw:frame draw:style-name="fr2" draw:name="Image9" text:anchor-type="char" svg:x="-0.298cm" svg:y="0cm" svg:width="11.437cm" svg:height="11.631cm" draw:z-index="56"><draw:image xlink:href="Pictures/10000001000002FD0000030A51CC3142.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6" text:outline-level="1"><text:soft-page-break/>For <text:span text:style-name="T109">seveen</text:span>(<text:span text:style-name="T109">7</text:span>): <text:span text:style-name="T107">The output</text:span></text:h>
      <text:h text:style-name="P11" text:outline-level="1"><draw:frame draw:style-name="fr2" draw:name="Image10" text:anchor-type="char" svg:x="0.27cm" svg:y="0cm" svg:width="10.608cm" svg:height="10.788cm" draw:z-index="57"><draw:image xlink:href="Pictures/10000001000002FD0000030A64C1EE5D.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7" text:outline-level="1">For <text:span text:style-name="T110">eight(8</text:span>): <text:span text:style-name="T107">The output</text:span></text:h>
      <text:h text:style-name="P11" text:outline-level="1"><draw:frame draw:style-name="fr2" draw:name="Image11" text:anchor-type="char" svg:x="0.021cm" svg:y="0cm" svg:width="11.165cm" svg:height="11.354cm" draw:z-index="58"><draw:image xlink:href="Pictures/10000001000002FD0000030ACDB61AE8.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7" text:outline-level="1"><text:soft-page-break/>For <text:span text:style-name="T110">nine</text:span>(<text:span text:style-name="T110">9</text:span>): <text:span text:style-name="T107">The output</text:span></text:h>
      <text:h text:style-name="P11" text:outline-level="1"><draw:frame draw:style-name="fr2" draw:name="Image12" text:anchor-type="char" svg:x="-0.004cm" svg:y="0.092cm" svg:width="10.432cm" svg:height="10.606cm" draw:z-index="59"><draw:image xlink:href="Pictures/10000001000002FD0000030A60575AD2.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31" text:outline-level="1">C<text:span text:style-name="T110">HALLENGES FACED:</text:span></text:h>
      <text:h text:style-name="P14" text:outline-level="1"/>
      <text:h text:style-name="P48" text:outline-level="1">Throughout the course of this project, we encountered several technical and conceptual challenges that tested our understanding of deep learning, dataset handling, and overall project structure. Here are some of the key issues we faced and how we addressed them:</text:h>
      <text:h text:style-name="P21" text:outline-level="1"/>
      <text:list text:style-name="L9">
        <text:list-item>
          <text:h text:style-name="P52" text:outline-level="1">Dataset Confusion/<text:span text:style-name="T110">Conflict</text:span> with EMNIST</text:h>
        </text:list-item>
      </text:list>
      <text:h text:style-name="P11" text:outline-level="1"><text:span text:style-name="T121">One of the most frustrating moments was working with the </text:span><text:span text:style-name="Strong_20_Emphasis"><text:span text:style-name="T121">EMNIST dataset</text:span></text:span><text:span text:style-name="T121">. Unlike MNIST, EMNIST images are </text:span><text:span text:style-name="Strong_20_Emphasis"><text:span text:style-name="T121">rotated and mirrored</text:span></text:span><text:span text:style-name="T121"> due to how they were formatted for compatibility with the original NIST dataset. Initially, this caused our model to predict completely incorrect digits. After some research and trial-and-error, we fixed this using </text:span><text:span text:style-name="Source_20_Text"><text:span text:style-name="T121">tf.image.rot90()</text:span></text:span><text:span text:style-name="T121"> and </text:span><text:span text:style-name="Source_20_Text"><text:span text:style-name="T121">tf.image.flip_left_right()</text:span></text:span><text:span text:style-name="T121"> during preprocessing.</text:span></text:h>
      <text:h text:style-name="P49" text:outline-level="1"><text:span text:style-name="T106"/></text:h>
      <text:h text:style-name="P11" text:outline-level="1"><text:span text:style-name="Strong_20_Emphasis"><text:span text:style-name="T122">Lesson learned:</text:span></text:span><text:span text:style-name="T121"> Always check the orientation and format of your dataset before feeding it to the model.</text:span></text:h>
      <text:h text:style-name="P11" text:outline-level="1"><text:span text:style-name="T106"/></text:h>
      <text:list text:style-name="L10">
        <text:list-item>
          <text:h text:style-name="P54" text:outline-level="1"><text:soft-page-break/>Model Accuracy and Overfitting</text:h>
        </text:list-item>
      </text:list>
      <text:h text:style-name="P12" text:outline-level="1"><text:span text:style-name="T122">During early testing, our models performed well on the training set but poorly on unseen test data. This pointed to </text:span><text:span text:style-name="Strong_20_Emphasis"><text:span text:style-name="T122">overfitting</text:span></text:span><text:span text:style-name="T122">. We had to tune batch sizes, adjust layer complexities, and experiment with different optimizers. Although we still faced </text:span><text:span text:style-name="Strong_20_Emphasis"><text:span text:style-name="T122">accuracy limitations</text:span></text:span><text:span text:style-name="T122">, especially with EMNIST, the models did improve after these adjustments.</text:span></text:h>
      <text:h text:style-name="P12" text:outline-level="1"><draw:frame draw:style-name="fr2" draw:name="Image13" text:anchor-type="char" svg:x="0.344cm" svg:y="0cm" svg:width="9.412cm" svg:height="9.571cm" draw:z-index="60"><draw:image xlink:href="Pictures/10000001000002FD0000030A104ACE49.png" xlink:type="simple" xlink:show="embed" xlink:actuate="onLoad" draw:mime-type="image/png"/></draw:frame><text:span text:style-name="T84"/></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21" text:outline-level="1"/>
      <text:h text:style-name="P21" text:outline-level="1"/>
      <text:h text:style-name="P11" text:outline-level="1"><text:span text:style-name="Strong_20_Emphasis"><text:span text:style-name="T125">Lesson learned</text:span></text:span><text:span text:style-name="Strong_20_Emphasis"><text:span text:style-name="T121">:</text:span></text:span><text:span text:style-name="T121"> More layers don’t always mean better performance — simplicity often wins, especially with limited training time.</text:span></text:h>
      <text:h text:style-name="P21" text:outline-level="1"/>
      <text:list text:style-name="L11">
        <text:list-item>
          <text:h text:style-name="P53" text:outline-level="1">GPU Issues and Training Time</text:h>
        </text:list-item>
      </text:list>
      <text:h text:style-name="P50" text:outline-level="1">We also ran into hardware limitations. The training time on our local systems was longer than expected. Moreover, we received several CUDA-related errors due to missing or misconfigured GPU drivers.</text:h>
      <text:h text:style-name="P21" text:outline-level="1"/>
      <text:h text:style-name="P22" text:outline-level="1">For example:</text:h>
      <text:h text:style-name="P51" text:outline-level="1">“failed call to cuInit: INTERNAL: CUDA error: Failed call to cuInit: UNKNOWN ERROR (303)”</text:h>
      <text:h text:style-name="P49" text:outline-level="1"><text:span text:style-name="T106">This forced us to continue training using only the CPU, which slowed down experimentation.</text:span></text:h>
      <text:h text:style-name="P11" text:outline-level="1"><text:span text:style-name="Strong_20_Emphasis"><text:span text:style-name="T122">Lesson learned:</text:span></text:span><text:span text:style-name="T122"> </text:span><text:span text:style-name="T121">Having access to a proper GPU setup is a huge advantage in deep learning tasks.</text:span></text:h>
      <text:h text:style-name="P11" text:outline-level="1"><text:soft-page-break/><text:span text:style-name="T88"/></text:h>
      <text:h text:style-name="P45" text:outline-level="1">CONCLUSION:</text:h>
      <text:p text:style-name="P19"><text:span text:style-name="T124">Working on the DigitRec project has been a challenging yet rewarding experience. Through the development of two separate convolutional neural network models — one trained on the standard </text:span><text:span text:style-name="Strong_20_Emphasis"><text:span text:style-name="T124">MNIST</text:span></text:span><text:span text:style-name="T124"> dataset and another on the more complex and rotated </text:span><text:span text:style-name="Strong_20_Emphasis"><text:span text:style-name="T124">EMNIST Digits</text:span></text:span><text:span text:style-name="T124"> dataset — we gained practical insights into deep learning, model architecture design, and the intricacies of real-world data preprocessing.</text:span></text:p>
      <text:p text:style-name="P88">While the MNIST-based model delivered strong results with relatively little tuning, the EMNIST model introduced us to more nuanced challenges like image orientation correction and dataset formatting inconsistencies. These roadblocks not only tested our technical skills but also taught us how to troubleshoot issues that aren’t always documented in tutorials or guides.</text:p>
      <text:p text:style-name="P88">The project also highlighted the importance of clean data, the power of model simplicity, and the very real constraints of computing resources. Despite hardware issues and time pressure, we stayed committed to building models that genuinely learned to recognize handwritten digits — even if the accuracy was not perfect.</text:p>
      <text:p text:style-name="P88">In the end, DigitRec helped us better understand the machine learning pipeline from dataset acquisition to model evaluation. More importantly, it reminded us that authenticity and learning matter far more than just achieving flawless results. This project wasn't just a submission — it was a hands-on crash course in the real-world challenges of AI and computer vi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family-generic="roma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425cm"/>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left="0.236cm" fo:text-align="center" style:justify-single-word="false" fo:text-indent="-0.252cm" style:auto-text-indent="false"/>
      <style:text-properties fo:font-size="12pt" fo:font-weight="bold" style:font-size-asian="12pt" style:font-weight-asian="bold" style:font-size-complex="12pt" style:font-weight-complex="bold"/>
    </style:style>
    <style:style style:name="Heading_20_3" style:display-name="Heading 3" style:family="paragraph" style:parent-style-name="Standard" style:default-outline-level="3" style:list-style-name="" style:class="text">
      <style:paragraph-properties fo:margin-left="0.834cm" fo:text-indent="-0.409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Title" style:family="paragraph" style:parent-style-name="Standard" style:class="chapter">
      <style:paragraph-properties fo:margin-left="1.653cm" fo:margin-right="1.734cm" fo:line-height="0.811cm" fo:text-align="center" style:justify-single-word="false"/>
      <style:text-properties fo:font-size="20pt" fo:font-weight="bold" style:font-size-asian="20pt" style:font-weight-asian="bold" style:font-size-complex="20pt" style:font-weight-complex="bold"/>
    </style:style>
    <style:style style:name="List_20_Paragraph" style:display-name="List Paragraph" style:family="paragraph" style:parent-style-name="Standard">
      <style:paragraph-properties fo:margin-left="0.663cm" fo:text-indent="-0.238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0pt" fo:letter-spacing="normal" fo:language="en" fo:country="US"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95%"/>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2pt" fo:letter-spacing="normal" fo:language="en" fo:country="US" fo:font-style="normal" fo:font-weight="bold" style:font-name-asian="Times New Roman2" style:font-family-asian="'Times New Roman'"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1" style:display-name="ListLabel 11" style:family="text">
      <style:text-properties style:font-name="Times New Roman1" fo:font-family="'Times New Roman'" style:font-family-generic="roman" style:font-pitch="variable" fo:font-size="12pt" fo:letter-spacing="-0.005cm" fo:language="en" fo:country="US" fo:font-style="italic" fo:font-weight="bold" style:font-name-asian="Times New Roman2" style:font-family-asian="'Times New Roman'"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language-complex="ar" style:country-complex="SA" style:font-style-complex="italic" style:font-weight-complex="bold" style:text-scale="100%"/>
    </style:style>
    <style:style style:name="ListLabel_20_12" style:display-name="ListLabel 12" style:family="text">
      <style:text-properties fo:font-size="12pt" fo:letter-spacing="normal" fo:language="en" fo:country="US"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695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65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14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62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109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59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07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4cm" fo:margin-left="0.002cm"/>
        </style:list-level-properties>
        <style:text-properties fo:font-family="'Times New Roman'"/>
      </text:list-level-style-bullet>
      <text:list-level-style-number text:level="2" text:style-name="ListLabel_20_11" loext:num-list-format="%2%." style:num-suffix="." style:num-format="1">
        <style:list-level-properties text:list-level-position-and-space-mode="label-alignment">
          <style:list-level-label-alignment text:label-followed-by="listtab" fo:text-indent="-0.411cm" fo:margin-left="0.921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242cm" fo:margin-left="0.667cm"/>
        </style:list-level-properties>
        <style:text-properties fo:font-family="'Times New Roman'"/>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42cm" fo:margin-left="2.86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42cm" fo:margin-left="4.81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42cm" fo:margin-left="6.77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42cm" fo:margin-left="8.72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42cm" fo:margin-left="10.67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42cm" fo:margin-left="12.6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35cm" fo:margin-top="0.012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Text_20_body">
      <style:paragraph-properties fo:margin-left="0.106cm" fo:line-height="0.466cm"/>
    </style:style>
    <style:style style:name="MT1" style:family="text">
      <style:text-properties fo:font-size="10pt" style:font-size-asian="10pt"/>
    </style:style>
    <style:style style:name="MT2" style:family="text">
      <style:text-properties fo:font-weight="bold" style:font-weight-asian="bold"/>
    </style:style>
    <style:style style:name="MT3" style:family="text">
      <style:text-properties fo:color="#0d0d0d" loext:opacity="100%" style:font-name="Calibri" fo:letter-spacing="-0.004cm"/>
    </style:style>
    <style:style style:name="MT4" style:family="text">
      <style:text-properties fo:color="#0d0d0d" loext:opacity="100%" fo:letter-spacing="-0.004cm" fo:font-weight="bold" style:font-weight-asian="bold"/>
    </style:style>
    <style:style style:name="MT5" style:family="text">
      <style:text-properties fo:color="#0d0d0d" loext:opacity="100%" fo:letter-spacing="-0.016cm" fo:font-weight="bold" style:font-weight-asian="bold"/>
    </style:style>
    <style:style style:name="MT6" style:family="text">
      <style:text-properties fo:color="#0d0d0d" loext:opacity="100%" fo:letter-spacing="-0.012cm" fo:font-weight="bold" style:font-weight-asian="bold"/>
    </style:style>
    <style:style style:name="MT7" style:family="text">
      <style:text-properties fo:color="#0d0d0d" loext:opacity="100%" fo:letter-spacing="-0.014cm" fo:font-weight="bold" style:font-weight-asian="bold"/>
    </style:style>
    <style:style style:name="MT8" style:family="text">
      <style:text-properties style:font-name="Calibri"/>
    </style:style>
    <style:style style:name="MT9" style:family="text">
      <style:text-properties style:font-name="Calibri" fo:letter-spacing="-0.018cm"/>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517cm" fo:min-width="7.646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496cm" fo:min-width="0.46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11cm" fo:margin-bottom="1.697cm" fo:margin-left="2.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page-layout style:name="Mpm2">
      <style:page-layout-properties fo:page-width="21.001cm" fo:page-height="29.7cm" style:num-format="1" style:print-orientation="portrait" fo:margin-top="0.917cm" fo:margin-bottom="0.917cm" fo:margin-left="0.917cm" fo:margin-right="0.917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top="2.346cm" fo:padding-bottom="0.621cm" fo:padding-left="1.674cm" fo:padding-right="0.674cm" style:writing-mode="lr-tb" style:layout-grid-color="#c0c0c0" style:layout-grid-lines="2423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page-layout style:name="Mpm3">
      <style:page-layout-properties fo:page-width="21.001cm" fo:page-height="29.7cm" style:num-format="1" style:print-orientation="portrait" fo:margin-top="0.917cm" fo:margin-bottom="0.917cm" fo:margin-left="0.917cm" fo:margin-right="0.917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top="1.041cm" fo:padding-bottom="0.621cm" fo:padding-left="1.674cm" fo:padding-right="0.674cm" style:writing-mode="lr-tb" style:layout-grid-color="#c0c0c0" style:layout-grid-lines="2553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page-layout style:name="Mpm4">
      <style:page-layout-properties fo:page-width="21.001cm" fo:page-height="29.7cm" style:num-format="1" style:print-orientation="portrait" fo:margin-top="0.917cm" fo:margin-bottom="0.917cm" fo:margin-left="0.917cm" fo:margin-right="0.917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top="1.676cm" fo:padding-bottom="0.621cm" fo:padding-left="1.674cm" fo:padding-right="0.674cm" style:writing-mode="lr-tb" style:layout-grid-color="#c0c0c0" style:layout-grid-lines="249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0" draw:name="Textbox 1" draw:style-name="Mgr1" draw:text-style-name="MP3" svg:width="7.645cm" svg:height="0.516cm" svg:x="6.304cm" svg:y="27.638cm"><text:p text:style-name="MP2" loext:marker-style-name="MT2"><text:span text:style-name="MT3">[</text:span><text:span text:style-name="MT4">DEPARTMENT</text:span><text:span text:style-name="MT5"> </text:span><text:span text:style-name="MT4">OF</text:span><text:span text:style-name="MT6"> </text:span><text:span text:style-name="MT4">CSE(DATA</text:span><text:span text:style-name="MT7"> </text:span><text:span text:style-name="MT4">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box 2" draw:style-name="Mgr2" draw:text-style-name="MP3" svg:width="0.463cm" svg:height="0.495cm" svg:x="19.376cm" svg:y="27.702cm"><text:p text:style-name="MP4" loext:marker-style-name="MT8"><text:span text:style-name="MT9"><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footer>
        <text:p text:style-name="MP1" loext:marker-style-name="MT1"><draw:custom-shape text:anchor-type="char" draw:z-index="4" draw:name="Textbox 3" draw:style-name="Mgr1" draw:text-style-name="MP3" svg:width="7.645cm" svg:height="0.516cm" svg:x="6.304cm" svg:y="27.638cm"><text:p text:style-name="MP2" loext:marker-style-name="MT2"><text:span text:style-name="MT3">[</text:span><text:span text:style-name="MT4">DEPARTMENT</text:span><text:span text:style-name="MT5"> </text:span><text:span text:style-name="MT4">OF</text:span><text:span text:style-name="MT6"> </text:span><text:span text:style-name="MT4">CSE(DATA</text:span><text:span text:style-name="MT7"> </text:span><text:span text:style-name="MT4">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box 4" draw:style-name="Mgr2" draw:text-style-name="MP3" svg:width="0.463cm" svg:height="0.495cm" svg:x="19.376cm" svg:y="27.702cm"><text:p text:style-name="MP4" loext:marker-style-name="MT8"><text:span text:style-name="MT9"><text:page-number text:select-page="current">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footer>
        <text:p text:style-name="MP1" loext:marker-style-name="MT1"><draw:custom-shape text:anchor-type="char" draw:z-index="12" draw:name="Textbox 5" draw:style-name="Mgr1" draw:text-style-name="MP3" svg:width="7.645cm" svg:height="0.516cm" svg:x="6.304cm" svg:y="27.638cm"><text:p text:style-name="MP2" loext:marker-style-name="MT2"><text:span text:style-name="MT3">[</text:span><text:span text:style-name="MT4">DEPARTMENT</text:span><text:span text:style-name="MT5"> </text:span><text:span text:style-name="MT4">OF</text:span><text:span text:style-name="MT6"> </text:span><text:span text:style-name="MT4">CSE(DATA</text:span><text:span text:style-name="MT7"> </text:span><text:span text:style-name="MT4">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 text:anchor-type="char" svg:x="0cm" svg:y="0cm" svg:width="7.648cm" svg:height="0.519cm" draw:z-index="0"><draw:text-box><text:p text:style-name="MP2" loext:marker-style-name="MT2"><text:span text:style-name="MT3">[</text:span><text:span text:style-name="MT4">DEPARTMENT</text:span><text:span text:style-name="MT5"> </text:span><text:span text:style-name="MT4">OF</text:span><text:span text:style-name="MT6"> </text:span><text:span text:style-name="MT4">CSE(DATA</text:span><text:span text:style-name="MT7"> </text:span><text:span text:style-name="MT4">SCIENCE)]</text:span></text:p></draw:text-box></draw:frame><draw:frame draw:style-name="Mfr1" draw:name="Frame51" text:anchor-type="char" svg:x="6.304cm" svg:y="27.638cm" svg:width="7.648cm" svg:height="0.519cm" draw:z-index="0"><draw:text-box><text:p text:style-name="MP2" loext:marker-style-name="MT2"><text:span text:style-name="MT3">[</text:span><text:span text:style-name="MT4">DEPARTMENT</text:span><text:span text:style-name="MT5"> </text:span><text:span text:style-name="MT4">OF</text:span><text:span text:style-name="MT6"> </text:span><text:span text:style-name="MT4">CSE(DATA</text:span><text:span text:style-name="MT7"> </text:span><text:span text:style-name="MT4">SCIENCE)]</text:span></text:p></draw:text-box></draw:frame><draw:custom-shape text:anchor-type="char" draw:z-index="16" draw:name="Textbox 6" draw:style-name="Mgr2" draw:text-style-name="MP3" svg:width="0.463cm" svg:height="0.495cm" svg:x="19.376cm" svg:y="27.702cm"><text:p text:style-name="MP4" loext:marker-style-name="MT8"><text:span text:style-name="MT9"><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 text:anchor-type="char" svg:x="0cm" svg:y="0cm" svg:width="0.466cm" svg:height="0.497cm" draw:z-index="0"><draw:text-box><text:p text:style-name="MP4" loext:marker-style-name="MT8"><text:span text:style-name="MT9"><text:page-number text:select-page="current">0</text:page-number></text:span></text:p></draw:text-box></draw:frame><draw:frame draw:style-name="Mfr1" draw:name="Frame61" text:anchor-type="char" svg:x="19.376cm" svg:y="27.702cm" svg:width="0.466cm" svg:height="0.497cm" draw:z-index="0"><draw:text-box><text:p text:style-name="MP4" loext:marker-style-name="MT8"><text:span text:style-name="MT9"><text:page-number text:select-page="current">0</text:page-number></text:span></text:p></draw:text-box></draw:frame></text:p>
      </style:footer>
    </style:master-page>
    <style:master-page style:name="Converted3" style:page-layout-name="Mpm3" draw:style-name="Mdp1">
      <style:footer>
        <text:p text:style-name="MP1" loext:marker-style-name="MT1"><draw:custom-shape text:anchor-type="char" draw:z-index="24" draw:name="Textbox 5" draw:style-name="Mgr1" draw:text-style-name="MP3" svg:width="7.645cm" svg:height="0.516cm" svg:x="6.304cm" svg:y="27.638cm"><text:p text:style-name="MP2" loext:marker-style-name="MT2"><text:span text:style-name="MT3">[</text:span><text:span text:style-name="MT4">DEPARTMENT</text:span><text:span text:style-name="MT5"> </text:span><text:span text:style-name="MT4">OF</text:span><text:span text:style-name="MT6"> </text:span><text:span text:style-name="MT4">CSE(DATA</text:span><text:span text:style-name="MT7"> </text:span><text:span text:style-name="MT4">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4" draw:style-name="Mdp1">
      <style:footer>
        <text:p text:style-name="MP1" loext:marker-style-name="MT1"><draw:custom-shape text:anchor-type="char" draw:z-index="11" draw:name="Textbox 7" draw:style-name="Mgr1" draw:text-style-name="MP3" svg:width="7.645cm" svg:height="0.516cm" svg:x="6.304cm" svg:y="27.638cm"><text:p text:style-name="MP2" loext:marker-style-name="MT2"><text:span text:style-name="MT3">[</text:span><text:span text:style-name="MT4">DEPARTMENT</text:span><text:span text:style-name="MT5"> </text:span><text:span text:style-name="MT4">OF</text:span><text:span text:style-name="MT6"> </text:span><text:span text:style-name="MT4">CSE(DATA</text:span><text:span text:style-name="MT7"> </text:span><text:span text:style-name="MT4">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ushi Satish</meta:initial-creator>
    <meta:editing-cycles>6</meta:editing-cycles>
    <meta:creation-date>2025-04-22T05:47:00</meta:creation-date>
    <dc:date>2025-05-04T20:07:27.226617575</dc:date>
    <meta:editing-duration>PT1H23M35S</meta:editing-duration>
    <meta:generator>LibreOffice/24.2.7.2$Linux_X86_64 LibreOffice_project/420$Build-2</meta:generator>
    <meta:document-statistic meta:table-count="0" meta:image-count="13" meta:object-count="0" meta:page-count="19" meta:paragraph-count="287" meta:word-count="2574" meta:character-count="18733" meta:non-whitespace-character-count="14707"/>
    <meta:user-defined meta:name="AppVersion">16.0000</meta:user-defined>
    <meta:user-defined meta:name="Created" meta:value-type="date">2025-04-17T00:00:00</meta:user-defined>
    <meta:user-defined meta:name="Creator">Microsoft® Word 2021</meta:user-defined>
    <meta:user-defined meta:name="LastSaved" meta:value-type="date">2025-04-22T00:00:00</meta:user-defined>
    <meta:user-defined meta:name="Producer" meta:value-type="string">Microsoft® Word 2021</meta:user-defined>
    <meta:template xlink:type="simple" xlink:actuate="onRequest" xlink:title="Normal" xlink:href=""/>
  </office:meta>
</office:document-meta>
</file>